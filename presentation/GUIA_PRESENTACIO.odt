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396" officeooo:paragraph-rsid="0003d396"/>
    </style:style>
    <style:style style:name="P2" style:family="paragraph" style:parent-style-name="Standard">
      <style:text-properties officeooo:rsid="0005d0c4" officeooo:paragraph-rsid="0005d0c4"/>
    </style:style>
    <style:style style:name="P3" style:family="paragraph" style:parent-style-name="Standard">
      <style:text-properties officeooo:rsid="00063e64" officeooo:paragraph-rsid="00063e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ar part 1 → </text:p>
      <text:p text:style-name="P2">Executar part 2 → nomes Outreach.csv input.</text:p>
      <text:p text:style-name="P2"/>
      <text:p text:style-name="P2">The numbers are actually correct — they add up. Let me break it down:</text:p>
      <text:p text:style-name="P2"/>
      <text:p text:style-name="P2"><text:s text:c="2"/>- Accounts Submitted: 176 (not 178 — that's what the script loaded from the accounts file)</text:p>
      <text:p text:style-name="P2"><text:s text:c="2"/>- Accounts with Prospects: 168 <text:s/>- Accounts without Prospects: 10</text:p>
      <text:p text:style-name="P2"><text:s text:c="2"/>- 168 + 10 = 178, which is 2 more than 176</text:p>
      <text:p text:style-name="P2"><text:s text:c="2"/>That discrepancy of 2 is likely because the accounts file (176 rows) gets merged with the prospects data, and during the merge, 2 additional account names appear in the prospects CSV that weren't in</text:p>
      <text:p text:style-name="P2"><text:s text:c="2"/>the original accounts file. This can happen if the Outreach export contains account names that weren't in the original CRM account list — for example, accounts that were added to Outreach after the</text:p>
      <text:p text:style-name="P2"><text:s text:c="2"/>CRM export, or slight name variations.</text:p>
      <text:p text:style-name="P2"/>
      <text:p text:style-name="P2"><text:s text:c="2"/>So the math is:</text:p>
      <text:p text:style-name="P2"/>
      <text:p text:style-name="P2"><text:s text:c="2"/>┌───────────────────────────────────────────────────┬───────┐</text:p>
      <text:p text:style-name="P2"><text:s text:c="2"/>│ <text:s text:c="21"/>Metric <text:s text:c="22"/>│ Value │</text:p>
      <text:p text:style-name="P2"><text:s text:c="2"/>├───────────────────────────────────────────────────┼───────┤</text:p>
      <text:p text:style-name="P2"><text:s text:c="2"/>│ Accounts in file <text:s text:c="33"/>│ 176 <text:s text:c="2"/>│</text:p>
      <text:p text:style-name="P2"><text:s text:c="2"/>├───────────────────────────────────────────────────┼───────┤</text:p>
      <text:p text:style-name="P2"><text:s text:c="2"/>│ Accounts found in prospects <text:s text:c="22"/>│ 168 <text:s text:c="2"/>│</text:p>
      <text:p text:style-name="P2"><text:s text:c="2"/>├───────────────────────────────────────────────────┼───────┤</text:p>
      <text:p text:style-name="P2"><text:s text:c="2"/>│ Accounts with zero prospects <text:s text:c="21"/>│ 10 <text:s text:c="3"/>│</text:p>
      <text:p text:style-name="P2"><text:s text:c="2"/>├───────────────────────────────────────────────────┼───────┤</text:p>
      <text:p text:style-name="P2"><text:s text:c="2"/>│ Total accounted for <text:s text:c="30"/>│ 178 <text:s text:c="2"/>│</text:p>
      <text:p text:style-name="P2"><text:s text:c="2"/>├───────────────────────────────────────────────────┼───────┤</text:p>
      <text:p text:style-name="P2"><text:s text:c="2"/>│ Unmatched (in prospects but not in accounts file) │ 2 <text:s text:c="4"/>│</text:p>
      <text:p text:style-name="P2"><text:s text:c="2"/>└───────────────────────────────────────────────────┴───────┘</text:p>
      <text:p text:style-name="P2"/>
      <text:p text:style-name="P2"><text:s text:c="2"/>This is normal behavior — it just means 2 account names in the Outreach export don't match any account in the CRM file. If you want to investigate which ones, I can add a quick diagnostic print.</text:p>
      <text:p text:style-name="P2"><text:s text:c="2"/>Otherwise, the pipeline is working correctly.<text:line-break/></text:p>
      <text:p text:style-name="P3">Executar part 3 → nomes ZI input</text:p>
      <text:p text:style-name="P3"/>
      <text:p text:style-name="P3">Input data: <text:s/>- 176 accounts loaded from the accounts file</text:p>
      <text:p text:style-name="P3"><text:soft-page-break/><text:s text:c="2"/>- 14 rows in the raw ZI CSV — but wait, the output says 784 prospects found. That's because Part 3's CONFIG has optional_inputs set to ["_Outreach Prospects.xlsx", "_LG Prospects.xlsx"] (lines 66–69 <text:s/>of part3), so it appends the prospects from the previous parts into the same dataframe. Those 784 prospects = 14 (ZI) + 669 (Outreach) + however many from LG.</text:p>
      <text:p text:style-name="P3"/>
      <text:p text:style-name="P3"><text:s text:c="2"/>Issue breakdown:</text:p>
      <text:p text:style-name="P3"><text:s text:c="2"/>- 99 Duplicates — all 99 issues are "Duplicate". This makes sense because the ZI export likely contains contacts that already appeared in Outreach or LG. Since the pipeline concatenates all three</text:p>
      <text:p text:style-name="P3"><text:s text:c="2"/>sources, the same person shows up multiple times and gets flagged.</text:p>
      <text:p text:style-name="P3"/>
      <text:p text:style-name="P3"><text:s text:c="2"/>Accounts with more than 5 prospects: 147 — this seems very high. It means 147 accounts have more than 5 prospects across the combined pool. This is the cumulative count from all three sources.</text:p>
      <text:p text:style-name="P3"/>
      <text:p text:style-name="P3"><text:s text:c="2"/>Deliverable stats:</text:p>
      <text:p text:style-name="P3"><text:s text:c="2"/>- 784 prospects in the deliverable (all sources combined)</text:p>
      <text:p text:style-name="P3"><text:s text:c="2"/>- 752 with emails (32 missing emails)</text:p>
      <text:p text:style-name="P3"><text:s text:c="2"/>- 763 with LinkedIn URLs (21 missing)</text:p>
      <text:p text:style-name="P3"><text:s text:c="2"/>- 168 accounts with at least one prospect</text:p>
      <text:p text:style-name="P3"><text:s text:c="2"/>- 176 − 168 = 8 accounts with zero prospects</text:p>
      <text:p text:style-name="P3"><text:s text:c="2"/>- Enrichment Rate: 96% (168/176 accounts covered)</text:p>
      <text:p text:style-name="P3"><text:s text:c="2"/>- 38 accounts have fewer than 5 prospects</text:p>
      <text:p text:style-name="P3"><text:s text:c="2"/>- 8 + 38 = 46 accounts needing more prospects</text:p>
      <text:p text:style-name="P3"/>
      <text:p text:style-name="P3"><text:s text:c="2"/>The math checks out: 168 + 8 = 176 accounts total. The 38 accounts with &lt;5 prospects plus the 8 with zero = 46 accounts that need more prospecting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6-05-17T01:26:47.790000000</dc:date>
    <meta:editing-duration>PT29M39S</meta:editing-duration>
    <meta:editing-cycles>4</meta:editing-cycles>
    <meta:document-statistic meta:table-count="0" meta:image-count="0" meta:object-count="0" meta:page-count="2" meta:paragraph-count="42" meta:word-count="485" meta:character-count="3313" meta:non-whitespace-character-count="2623"/>
  </office:meta>
</office:document-meta>
</file>
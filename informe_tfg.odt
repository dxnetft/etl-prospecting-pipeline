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Normal" style:font-family-generic="roman" style:font-pitch="variable" style:font-charset="x-symbol"/>
    <style:font-face style:name="HELVETICA" svg:font-family="HELVETICA" style:font-family-generic="swiss"/>
    <style:font-face style:name="Arial" svg:font-family="Arial" style:font-family-generic="roman" style:font-pitch="variable"/>
    <style:font-face style:name="Helvetica1" svg:font-family="Helvetica" style:font-family-generic="roman" style:font-pitch="variable"/>
    <style:font-face style:name="Helvetica Condensed" svg:font-family="'Helvetica Condensed'"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 svg:font-family="Palatino" style:font-family-generic="roman" style:font-pitch="variable"/>
    <style:font-face style:name="Palatino Linotype" svg:font-family="'Palatino Linotype'"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Helvetica" svg:font-family="Helvetic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top="0cm" fo:margin-bottom="0.353cm" style:contextual-spacing="false" fo:line-height="0.318cm">
        <style:tab-stops>
          <style:tab-stop style:position="18.203cm" style:type="right"/>
        </style:tab-stops>
      </style:paragraph-properties>
    </style:style>
    <style:style style:name="P2" style:family="paragraph" style:parent-style-name="Header">
      <style:paragraph-properties fo:margin-top="0cm" fo:margin-bottom="0.353cm" style:contextual-spacing="false" fo:line-height="0.318cm">
        <style:tab-stops>
          <style:tab-stop style:position="18.203cm" style:type="right"/>
        </style:tab-stops>
      </style:paragraph-properties>
      <style:text-properties officeooo:paragraph-rsid="000cda5d"/>
    </style:style>
    <style:style style:name="P3" style:family="paragraph" style:parent-style-name="Standard">
      <style:paragraph-properties fo:margin-top="0cm" fo:margin-bottom="0.353cm" style:contextual-spacing="false" fo:line-height="0.035cm" fo:text-align="center" style:justify-single-word="false"/>
      <style:text-properties style:font-name="Arial"/>
    </style:style>
    <style:style style:name="P4" style:family="paragraph" style:parent-style-name="Standard">
      <style:paragraph-properties fo:margin-top="0cm" fo:margin-bottom="0.353cm" style:contextual-spacing="false" fo:line-height="0.035cm" fo:text-align="center" style:justify-single-word="false"/>
    </style:style>
    <style:style style:name="P5" style:family="paragraph" style:parent-style-name="Footer">
      <style:paragraph-properties fo:margin-top="0cm" fo:margin-bottom="0.353cm" style:contextual-spacing="false" fo:line-height="0.035cm" fo:text-align="center" style:justify-single-word="false"/>
    </style:style>
    <style:style style:name="P6" style:family="paragraph" style:parent-style-name="References">
      <style:paragraph-properties fo:margin-top="0cm" fo:margin-bottom="0.353cm" style:contextual-spacing="false"/>
    </style:style>
    <style:style style:name="P7" style:family="paragraph" style:parent-style-name="ABSTRACT">
      <style:paragraph-properties fo:margin-left="0.85cm" fo:margin-right="0.85cm" fo:line-height="100%" fo:text-indent="0cm" style:auto-text-indent="false"/>
    </style:style>
    <style:style style:name="P8" style:family="paragraph" style:parent-style-name="ABSTRACT">
      <style:paragraph-properties fo:margin-left="0.85cm" fo:margin-right="0.85cm" fo:line-height="100%" fo:text-indent="0cm" style:auto-text-indent="false"/>
      <style:text-properties fo:color="#000000" loext:opacity="100%" fo:language="ca" fo:country="ES"/>
    </style:style>
    <style:style style:name="P9" style:family="paragraph" style:parent-style-name="Heading_20_1">
      <style:paragraph-properties fo:margin-left="0.564cm" fo:margin-right="0cm" fo:line-height="100%" fo:text-indent="0cm" style:auto-text-indent="false"/>
    </style:style>
    <style:style style:name="P10" style:family="paragraph" style:parent-style-name="Heading_20_1">
      <style:paragraph-properties fo:margin-left="0.564cm" fo:margin-right="0cm" fo:line-height="100%" fo:text-indent="0cm" style:auto-text-indent="false"/>
      <style:text-properties fo:color="#000000" loext:opacity="100%" fo:language="ca" fo:country="ES"/>
    </style:style>
    <style:style style:name="P11" style:family="paragraph" style:parent-style-name="PARAGRAPH">
      <style:paragraph-properties fo:margin-left="0cm" fo:margin-right="0cm" fo:line-height="100%" fo:text-indent="0cm" style:auto-text-indent="false"/>
      <style:text-properties fo:color="#000000" loext:opacity="100%" fo:language="ca" fo:country="ES"/>
    </style:style>
    <style:style style:name="P12" style:family="paragraph" style:parent-style-name="Text">
      <style:paragraph-properties fo:margin-left="0cm" fo:margin-right="0cm" fo:line-height="100%" fo:text-indent="0cm" style:auto-text-indent="false"/>
    </style:style>
    <style:style style:name="P13" style:family="paragraph" style:parent-style-name="Text_20_body">
      <style:paragraph-properties fo:margin-left="0cm" fo:margin-right="0cm" fo:line-height="100%" fo:text-indent="0cm" style:auto-text-indent="false"/>
    </style:style>
    <style:style style:name="P14" style:family="paragraph" style:parent-style-name="Text_20_body">
      <style:paragraph-properties fo:margin-left="0cm" fo:margin-right="0cm" fo:line-height="100%" fo:text-indent="0cm" style:auto-text-indent="false"/>
      <style:text-properties officeooo:paragraph-rsid="000b5b03"/>
    </style:style>
    <style:style style:name="P15" style:family="paragraph" style:parent-style-name="Text_20_body">
      <style:paragraph-properties fo:margin-left="0cm" fo:margin-right="0cm" fo:line-height="100%" fo:text-indent="0cm" style:auto-text-indent="false"/>
      <style:text-properties fo:color="#000000" loext:opacity="100%" fo:language="ca" fo:country="ES"/>
    </style:style>
    <style:style style:name="P16" style:family="paragraph" style:parent-style-name="Heading_20_2">
      <style:paragraph-properties fo:margin-left="0cm" fo:margin-right="0cm" fo:line-height="100%" fo:text-indent="0cm" style:auto-text-indent="false"/>
      <style:text-properties fo:color="#000000" loext:opacity="100%" fo:language="ca" fo:country="ES"/>
    </style:style>
    <style:style style:name="P17" style:family="paragraph" style:parent-style-name="Heading_20_1">
      <style:paragraph-properties fo:margin-left="0cm" fo:margin-right="0cm" fo:line-height="100%" fo:text-indent="0cm" style:auto-text-indent="false"/>
    </style:style>
    <style:style style:name="P18" style:family="paragraph" style:parent-style-name="Heading_20_1">
      <style:paragraph-properties fo:margin-left="0cm" fo:margin-right="0cm" fo:line-height="100%" fo:text-indent="0cm" style:auto-text-indent="false"/>
      <style:text-properties fo:color="#000000" loext:opacity="100%" fo:language="es" fo:country="ES" officeooo:rsid="000b5b03" officeooo:paragraph-rsid="000b5b03"/>
    </style:style>
    <style:style style:name="P19" style:family="paragraph" style:parent-style-name="PARAGRAPH_20__28_no_20_indent_29_">
      <style:paragraph-properties fo:margin-top="0.212cm" fo:margin-bottom="0.353cm" style:contextual-spacing="false" fo:text-align="center" style:justify-single-word="false"/>
    </style:style>
    <style:style style:name="P20" style:family="paragraph" style:parent-style-name="References">
      <style:text-properties fo:color="#000000" loext:opacity="100%" style:font-name="Palatino" fo:letter-spacing="-0.011cm" fo:language="ca" fo:country="ES"/>
    </style:style>
    <style:style style:name="P21" style:family="paragraph" style:parent-style-name="References">
      <style:text-properties fo:color="#000000" loext:opacity="100%" style:font-name="Palatino Linotype" fo:letter-spacing="-0.011cm" fo:language="ca" fo:country="ES"/>
    </style:style>
    <style:style style:name="P22" style:family="paragraph" style:parent-style-name="Text_20_body">
      <style:paragraph-properties fo:line-height="100%"/>
    </style:style>
    <style:style style:name="P23" style:family="paragraph" style:parent-style-name="AUTHOR">
      <style:paragraph-properties fo:margin-top="0.141cm" fo:margin-bottom="0.635cm" style:contextual-spacing="false"/>
      <style:text-properties fo:color="#000000" loext:opacity="100%" fo:font-size="14pt" fo:language="ca" fo:country="ES" style:font-size-asian="14pt" style:font-size-complex="14pt"/>
    </style:style>
    <style:style style:name="P24" style:family="paragraph" style:parent-style-name="Reference_20_Head">
      <style:paragraph-properties fo:text-align="start" style:justify-single-word="false"/>
      <style:text-properties fo:color="#000000" loext:opacity="100%" style:font-name="Helvetica1" fo:font-size="11pt" fo:language="ca" fo:country="ES" fo:font-weight="bold" style:font-size-asian="11pt" style:font-weight-asian="bold" style:font-weight-complex="bold"/>
    </style:style>
    <style:style style:name="P25" style:family="paragraph" style:parent-style-name="Heading_20_1">
      <style:paragraph-properties fo:margin-top="0.353cm" fo:margin-bottom="0.141cm" style:contextual-spacing="false" fo:line-height="100%"/>
      <style:text-properties fo:color="#000000" loext:opacity="100%" fo:language="ca" fo:country="ES"/>
    </style:style>
    <style:style style:name="P26" style:family="paragraph" style:parent-style-name="Heading_20_1">
      <style:paragraph-properties fo:line-height="100%"/>
      <style:text-properties fo:color="#000000" loext:opacity="100%" fo:language="ca" fo:country="ES"/>
    </style:style>
    <style:style style:name="P27" style:family="paragraph" style:parent-style-name="PARAGRAPH_20__28_no_20_indent_29_">
      <style:paragraph-properties fo:line-height="100%"/>
      <style:text-properties fo:color="#000000" loext:opacity="100%" fo:language="ca" fo:country="ES"/>
    </style:style>
    <style:style style:name="P28" style:family="paragraph" style:parent-style-name="ABSTRACT">
      <style:paragraph-properties fo:margin-left="0.85cm" fo:margin-right="0.85cm" fo:line-height="100%" fo:text-indent="0cm" style:auto-text-indent="false"/>
      <style:text-properties fo:color="#000000" loext:opacity="100%" fo:language="ca" fo:country="ES"/>
    </style:style>
    <style:style style:name="P29" style:family="paragraph" style:parent-style-name="ARTICLE_20_TITLE" style:master-page-name="First_20_Page">
      <style:paragraph-properties fo:margin-top="0cm" fo:margin-bottom="0.212cm" style:contextual-spacing="false" style:page-number="auto"/>
      <style:text-properties fo:color="#000000" loext:opacity="100%" fo:language="ca" fo:country="ES"/>
    </style:style>
    <style:style style:name="P30" style:family="paragraph" style:parent-style-name="References" style:master-page-name="Converted1">
      <style:paragraph-properties style:page-number="auto"/>
      <style:text-properties fo:color="#000000" loext:opacity="100%" style:font-name="Helvetica1" fo:font-size="11pt" fo:language="ca" fo:country="ES" fo:font-weight="bold" style:font-size-asian="11pt" style:font-weight-asian="bold" style:font-weight-complex="bold"/>
    </style:style>
    <style:style style:name="P31" style:family="paragraph" style:parent-style-name="Text_20_body">
      <style:paragraph-properties fo:margin-left="0.85cm" fo:margin-right="0.85cm" fo:line-height="100%" fo:text-indent="0cm" style:auto-text-indent="false"/>
      <style:text-properties fo:color="#000000" loext:opacity="100%" style:font-name="HELVETICA" fo:font-size="8pt" fo:language="ca" fo:country="ES" officeooo:paragraph-rsid="000c81f3" style:font-size-asian="8pt" style:font-size-complex="8pt"/>
    </style:style>
    <style:style style:name="P32" style:family="paragraph" style:parent-style-name="Text_20_body">
      <style:paragraph-properties fo:line-height="100%"/>
      <style:text-properties fo:color="#000000" loext:opacity="100%" fo:language="ca" fo:country="ES"/>
    </style:style>
    <style:style style:name="P33" style:family="paragraph" style:parent-style-name="Text_20_body" style:list-style-name="WWNum2">
      <style:paragraph-properties fo:line-height="100%"/>
      <style:text-properties fo:color="#000000" loext:opacity="100%" fo:language="ca" fo:country="ES"/>
    </style:style>
    <style:style style:name="P34" style:family="paragraph" style:parent-style-name="Text_20_body" style:list-style-name="WWNum2">
      <style:paragraph-properties fo:line-height="100%"/>
      <style:text-properties fo:color="#000000" loext:opacity="100%" fo:font-size="8pt" fo:language="ca" fo:country="ES" style:font-size-asian="8pt" style:font-size-complex="8pt"/>
    </style:style>
    <style:style style:name="P35" style:family="paragraph" style:parent-style-name="Text_20_body" style:list-style-name="WWNum3">
      <style:paragraph-properties fo:margin-left="1.247cm" fo:margin-right="0cm" fo:text-indent="-0.499cm" style:auto-text-indent="false">
        <style:tab-stops>
          <style:tab-stop style:position="0cm"/>
        </style:tab-stops>
      </style:paragraph-properties>
    </style:style>
    <style:style style:name="P36" style:family="paragraph" style:parent-style-name="Text_20_body" style:list-style-name="WWNum4">
      <style:paragraph-properties fo:margin-left="1.247cm" fo:margin-right="0cm" fo:text-indent="-0.499cm" style:auto-text-indent="false">
        <style:tab-stops>
          <style:tab-stop style:position="0cm"/>
        </style:tab-stops>
      </style:paragraph-properties>
    </style:style>
    <style:style style:name="T1" style:family="text">
      <style:text-properties fo:font-variant="normal" fo:text-transform="none" fo:font-style="italic" style:font-style-asian="italic" text:display="none"/>
    </style:style>
    <style:style style:name="T2" style:family="text">
      <style:text-properties fo:font-variant="normal" fo:text-transform="none" text:display="none"/>
    </style:style>
    <style:style style:name="T3" style:family="text">
      <style:text-properties fo:font-variant="normal" fo:text-transform="none" fo:language="es" fo:country="ES" fo:font-style="italic" style:font-style-asian="italic" text:display="none"/>
    </style:style>
    <style:style style:name="T4" style:family="text">
      <style:text-properties fo:font-variant="normal" fo:text-transform="none" fo:language="es" fo:country="ES" text:display="none"/>
    </style:style>
    <style:style style:name="T5" style:family="text">
      <style:text-properties fo:font-variant="normal" fo:text-transform="none" fo:font-size="8pt" fo:language="es" fo:country="ES" fo:font-weight="bold" style:font-size-asian="8pt" style:font-weight-asian="bold" text:display="none"/>
    </style:style>
    <style:style style:name="T6" style:family="text">
      <style:text-properties fo:language="es" fo:country="ES"/>
    </style:style>
    <style:style style:name="T7" style:family="text">
      <style:text-properties fo:language="es" fo:country="ES" fo:font-style="italic" fo:font-weight="bold" style:font-style-asian="italic" style:font-weight-asian="bold" text:display="none"/>
    </style:style>
    <style:style style:name="T8" style:family="text">
      <style:text-properties fo:color="#000000" loext:opacity="100%" fo:language="ca" fo:country="ES"/>
    </style:style>
    <style:style style:name="T9" style:family="text">
      <style:text-properties fo:color="#000000" loext:opacity="100%" fo:language="ca" fo:country="ES" fo:font-weight="bold" style:font-weight-asian="bold"/>
    </style:style>
    <style:style style:name="T10" style:family="text">
      <style:text-properties fo:color="#000000" loext:opacity="100%" style:text-position="-11% 100%" style:font-name="Times New Roman" fo:language="ca" fo:country="ES"/>
    </style:style>
    <style:style style:name="T11" style:family="text">
      <style:text-properties fo:color="#000000" loext:opacity="100%" style:text-position="-11% 100%" style:font-name="Wingdings" fo:language="ca" fo:country="ES" style:font-name-asian="Wingdings1" style:font-name-complex="Wingdings1"/>
    </style:style>
    <style:style style:name="T12" style:family="text">
      <style:text-properties fo:color="#000000" loext:opacity="100%" fo:language="es" fo:country="ES"/>
    </style:style>
    <style:style style:name="T13" style:family="text">
      <style:text-properties fo:color="#000000" loext:opacity="100%" fo:language="es" fo:country="ES" officeooo:rsid="000b5b03"/>
    </style:style>
    <style:style style:name="T14" style:family="text">
      <style:text-properties fo:color="#000000" loext:opacity="100%" style:font-name="Palatino" fo:language="ca" fo:country="ES"/>
    </style:style>
    <style:style style:name="T15" style:family="text">
      <style:text-properties fo:color="#000000" loext:opacity="100%" style:font-name="Palatino" fo:font-size="9.5pt" fo:language="es" fo:country="ES" officeooo:rsid="000b5b03" style:letter-kerning="true" style:font-name-asian="Times New Roman2" style:font-size-asian="9.5pt" style:language-asian="en" style:country-asian="US" style:font-name-complex="Times New Roman2" style:font-size-complex="10pt" style:language-complex="ar" style:country-complex="SA"/>
    </style:style>
    <style:style style:name="T16" style:family="text">
      <style:text-properties fo:language="ca" fo:country="ES"/>
    </style:style>
    <style:style style:name="T17" style:family="text">
      <style:text-properties fo:text-transform="uppercase" fo:font-size="7pt" style:letter-kerning="true" style:font-size-asian="7pt"/>
    </style:style>
    <style:style style:name="T18" style:family="text">
      <style:text-properties fo:text-transform="uppercase" fo:color="#000000" loext:opacity="100%" fo:font-size="7pt" fo:language="ca" fo:country="ES" style:letter-kerning="true" style:font-size-asian="7pt"/>
    </style:style>
    <style:style style:name="T19" style:family="text">
      <style:text-properties fo:font-size="8pt" style:font-size-asian="8pt" style:font-size-complex="8pt"/>
    </style:style>
    <style:style style:name="Sect1" style:family="section">
      <style:section-properties text:dont-balance-text-columns="true" style:writing-mode="lr-tb" style:editable="false">
        <style:columns fo:column-count="2" fo:column-gap="0.423cm">
          <style:column style:rel-width="32767*" fo:start-indent="0cm" fo:end-indent="0.212cm"/>
          <style:column style:rel-width="32768*" fo:start-indent="0.212cm" fo:end-indent="0cm"/>
        </style:columns>
      </style:section-properties>
    </style:style>
    <style:style style:name="Sect2"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nstrucció d’una ETL per a la consolidació de prospecció comercial</text:p>
      <text:p text:style-name="P23">Dante Rodríguez Milán</text:p>
      <text:p text:style-name="P7"><text:span text:style-name="T9">Resum</text:span><text:span text:style-name="T8">—Resum del projecte, màxim 10 línies. </text:span></text:p>
      <text:p text:style-name="P31">En l'àmbit empresarial actual, la captació i retenció de clients és un factor crític per a la competitivitat de les organitzacions. Per ser eficients, les empreses necessiten prendre decisions informades i anticipar tendències del mercat. No obstant això, moltes organitzacions no ho fan de manera adequada, principalment a causa de la dispersió de les dades en sitges aïllades i la manca d'eines integrades. En aquest context, els equips de màrqueting i vendes necessiten solucions que els permetin gestionar i explotar les dades comercials de forma eficient. La proposta d'aquest Treball de Fi de Grau és proporcionar un sistema ETL (Extract, Transform, Load) que consolidi dades de prospecció comercial procedents de diferents fonts, garantint-ne la qualitat mitjançant processos de neteja i normalització, i carregant-les en un repositori centralitzat. El resultat és una infraestructura escalable que ofereix una visió unificada dels clients potencials i dóna suport a la presa de decisions comercials estratègiques. </text:p>
      <text:p text:style-name="P8"/>
      <text:p text:style-name="P7"><text:span text:style-name="T9">Paraules clau</text:span><text:span text:style-name="T8">—Paraules clau del projecte, màxim 2 línies. </text:span></text:p>
      <text:p text:style-name="P8">ETL (Extract, Transform, Load), integració de dades, prospecció comercial, qualitat de dades, consolidació d’informació, automatització de processos, anàlisi de dades, suport a la presa de decisions.</text:p>
      <text:p text:style-name="P8"/>
      <text:p text:style-name="P7"><text:span text:style-name="T9">Abstract</text:span><text:span text:style-name="T8">—Versió en anglès del resum. </text:span></text:p>
      <text:p text:style-name="P8">In today's business environment, customer acquisition and retention are critical factors for organizational competitiveness. To be efficient, companies need to make informed decisions and anticipate market trends. However, many organizations fail to do so adequately, mainly due to data dispersion across isolated silos and the lack of integrated tools. In this context, marketing and sales teams need solutions that allow them to manage and exploit commercial data efficiently. The proposal of this Final Degree Project is to provide an ETL (Extract, Transform, Load) system that consolidates commercial prospecting data from different sources, ensuring data quality through cleansing and normalization processes, and loading it into a centralized repository. The result is a scalable infrastructure that offers a unified view of potential clients and supports strategic commercial decision-making. </text:p>
      <text:p text:style-name="P7"><text:span text:style-name="T9">Index Terms</text:span><text:span text:style-name="T8">—Versió en anglès de les paraules clau. </text:span></text:p>
      <text:p text:style-name="P8">ETL (Extract, Transform, Load), data integration, commercial prospecting, data quality, information consolidation, process automation, data analytics, decision-making support.</text:p>
      <text:p text:style-name="P8"/>
      <text:p text:style-name="P19"><text:span text:style-name="T8">——————————</text:span><text:span text:style-name="T10"> <text:s text:c="2"/></text:span><text:span text:style-name="T11"></text:span><text:span text:style-name="T10"> <text:s text:c="2"/></text:span><text:span text:style-name="T8">——————————</text:span></text:p>
      <text:h text:style-name="P25" text:outline-level="1">1<text:tab/>Introducció - Context del treball</text:h>
      <text:section text:style-name="Sect1" text:name="TextSection">
        <text:h text:style-name="P17" text:outline-level="1"><text:span text:style-name="T13">1.1</text:span><text:span text:style-name="T12"> </text:span><text:span text:style-name="T8">Informació preliminar sobre la qüestió a tractar </text:span></text:h>
        <text:p text:style-name="P22"><text:span text:style-name="T8">Actualment, les empreses gestionen grans volums de dades provinents de múltiples fonts, especialment en l’àmbit comercial. Aquestes dades són essencials per a les activitats de </text:span><text:span text:style-name="Strong_20_Emphasis"><text:span text:style-name="T8">prospecció comercial</text:span></text:span><text:span text:style-name="T8">, ja que permeten identificar potencials clients i noves oportunitats de negoci. No obstant això, sovint aquesta informació es troba dispersa en diferents sistemes i formats, cosa que dificulta la seva integració i anàlisi.</text:span></text:p>
        <text:p text:style-name="P22"><text:span text:style-name="T8">Davant aquesta situació, les empreses tenen la necessitat d’</text:span><text:span text:style-name="Strong_20_Emphasis"><text:span text:style-name="T8">automatitzar els processos de recopilació i integració de dades</text:span></text:span><text:span text:style-name="T8">, amb l’objectiu de millorar l’eficiència operativa i facilitar la presa de decisions basada en informació fiable. </text:span></text:p>
        <text:p text:style-name="P32">Actualment, però, la realitat de moltes organitzacions dista molt d'aquest escenari ideal. Les dades comercials es troben emmagatzemades en sitges aïllades, on cada departament o sistema gestiona la seva pròpia informació sense cap tipus d'integració amb la resta. A més, és habitual trobar problemes de qualitat de les dades: registres duplicats, formats inconsistents, valors absents o incorrectes que fan infiable qualsevol anàlisi. A aquesta problemàtica s'hi suma la manca de data governance, és a dir, l'absència de polítiques i estàndards clars que regulin com s'han de gestionar, emmagatzemar i compartir les dades dins de l'organització. Com a conseqüència, els equips comercials i de màrqueting es veuen obligats a realitzar tasques manuals de recopilació i neteja de dades, cosa que suposa una pèrdua de temps i un risc elevat d'errors. Tot plegat genera una situació en què les empreses no poden aprofitar el valor real de la informació que ja tenen disponible. </text:p>
        <text:h text:style-name="P18" text:outline-level="1"><text:soft-page-break/>1.2 <text:s/>Finalitat</text:h>
        <text:p text:style-name="P14"><text:span text:style-name="T13">La finalitat d’aquest projecte és desenvolupar una solució </text:span><text:span text:style-name="T15">per </text:span><text:span text:style-name="T13">facilitar la identificació de clients potencials, millorar la captació i retenció de clients i permetre optimitzar els processos comercials mitjançant una millor gestió de la informació.</text:span></text:p>
        <text:h text:style-name="P17" text:outline-level="1"><text:span text:style-name="T13">2</text:span><text:span text:style-name="T12"> <text:s/>O</text:span><text:span text:style-name="T8">bjectiu</text:span></text:h>
        <text:p text:style-name="P13"><text:span text:style-name="T8">L’objectiu principal d’aquest treball és </text:span><text:span text:style-name="Strong_20_Emphasis"><text:span text:style-name="T8">dissenyar i implementar un procés ETL que permeti integrar i consolidar dades de prospecció comercial provinents de diverses fonts d’informació</text:span></text:span><text:span text:style-name="T8">.</text:span></text:p>
        <text:p text:style-name="Text_20_body">Els objectius específics són:</text:p>
        <text:list xml:id="list4137614401" text:style-name="WWNum3">
          <text:list-item>
            <text:p text:style-name="P35">Analitzar les fonts de dades disponibles.</text:p>
          </text:list-item>
          <text:list-item>
            <text:p text:style-name="P35">Dissenyar una arquitectura ETL adequada.</text:p>
          </text:list-item>
          <text:list-item>
            <text:p text:style-name="P35">Implementar els processos d’extracció, transformació i càrrega de dades.</text:p>
          </text:list-item>
          <text:list-item>
            <text:p text:style-name="P35">Consolidar la informació en un repositori centralitzat.</text:p>
          </text:list-item>
          <text:list-item>
            <text:p text:style-name="P35">Validar la qualitat de les dades obtingudes.</text:p>
          </text:list-item>
        </text:list>
        <text:h text:style-name="P17" text:outline-level="1"><text:span text:style-name="T13">3 <text:s/></text:span><text:span text:style-name="T8">Metodologia</text:span></text:h>
        <text:p text:style-name="Text_20_body">El desenvolupament d'aquest projecte s'abordarà mitjançant una metodologia iterativa i incremental, inspirada en els principis àgils, que permetrà anar construint i validant el sistema ETL de forma progressiva. A diferència d'un enfocament en cascada, aquest model permet detectar i corregir problemes en etapes primerenques, adaptant-se als canvis que puguin sorgir durant el desenvolupament.</text:p>
        <text:p text:style-name="Text_20_body">Per a la gestió i planificació del projecte s'utilitzarà un diagrama de Gantt que permetrà visualitzar la distribució temporal de les tasques, identificar dependències entre elles i controlar que el desenvolupament s'ajusta als terminis establerts. El progrés es revisarà periòdicament mitjançant sessions d'autoavaluació per assegurar que s'avança segons la planificació prevista.</text:p>
        <text:p text:style-name="Text_20_body">Pel que fa al desenvolupament tècnic, s'adoptarà un enfocament basat en prototips. En primer lloc, es construirà un prototip mínim funcional que cobreixi el flux complet del pipeline ETL amb una font de dades simple. A partir d'aquí, s'aniran incorporant de forma incremental noves fonts de dades, transformacions més complexes i mecanismes de control de qualitat. Cada increment serà provat i validat abans de continuar amb el següent.</text:p>
        <text:p text:style-name="Text_20_body">Per garantir la qualitat del codi i la traçabilitat dels canvis, s'utilitzarà un sistema de control de versions amb Git. A més, es definiran tests automatitzats per verificar el comportament dels components crítics del pipeline, especialment els processos de transformació i neteja de dades.</text:p>
        <text:p text:style-name="Text_20_body">Finalment, la documentació es redactarà de manera paral·lela al desenvolupament, registrant les decisions de disseny, els problemes trobats i les solucions adoptades a mesura que avanci el projecte, en lloc de deixar-la per al final.</text:p>
        <text:h text:style-name="P9" text:outline-level="1"><text:span text:style-name="T12">5</text:span><text:span text:style-name="T8"> <text:s/>planificació del treball </text:span></text:h>
        <text:p text:style-name="P15">El desenvolupament del projecte es dividirà en les següents fases:</text:p>
        <text:list xml:id="list1757939655" text:style-name="WWNum4">
          <text:list-item>
            <text:p text:style-name="P36">Anàlisi del problema i revisió de conceptes ETL.</text:p>
          </text:list-item>
          <text:list-item>
            <text:p text:style-name="P36">Disseny de l’arquitectura del sistema.</text:p>
          </text:list-item>
          <text:list-item>
            <text:p text:style-name="P36">Implementació dels processos ETL.</text:p>
          </text:list-item>
          <text:list-item>
            <text:p text:style-name="P36">Proves i validació del sistema.</text:p>
          </text:list-item>
          <text:list-item>
            <text:p text:style-name="P36">Redacció de la memòria final del TFG.</text:p>
          </text:list-item>
        </text:list>
        <text:p text:style-name="P15"/>
        <text:p text:style-name="P11"/>
        <text:h text:style-name="P10" text:outline-level="1">2.1 Exemple de subsecció</text:h>
        <text:p text:style-name="P11">..... .... .... .......... ...... ........ ...... ..... ...... ..... ..... .... .......... ...... ........ ............ ........ ...... ..... ...... ..... ..... .... .... .......... ...... ........ ...... ..... ...... ..... ..... .... .... .......... ...... ........ ...... ..... ...... ..... ..... .... ........ ...... .</text:p>
        <text:h text:style-name="P16" text:outline-level="2">2.2 Exemple de subsecció</text:h>
        <text:p text:style-name="P11">..... .... .... .......... ...... ........ ...... ..... ...... ..... ..... .... .......... ...... ........ ............ ........ ...... ..... ...... ..... ..... .... .... .......... ...... ........ ...... ..... ...... ..... ..... .... .... .......... ...... ........ ...... ..... ...... ..... ..... .... ........ ...... .</text:p>
        <text:h text:style-name="P26" text:outline-level="1">3<text:tab/>Conclusió</text:h>
        <text:p text:style-name="P12"><text:span text:style-name="T8">..... .... .... .......... ...... ........ ...... ..... ...... ..... ..... .... .......... ...... ........ ............ ........ ...... ..... ...... ..... ..... .... .... .......... ...... ........ ...... ..... ...... ..... ..... .... .... .......... ...... ........ ...... ..... ...... ..... ..... .... ........ ...... </text:span><text:span text:style-name="T14">.</text:span></text:p>
        <text:p text:style-name="P24">Agraïments</text:p>
        <text:p text:style-name="P27">..... .... .... .......... ...... ........ ...... ..... ...... ..... ..... .... .......... ...... ........ ............ ........ ...... ..... ...... ..... ..... .... .... .......... ...... ........ ...... ..... ...... ..... ..... .... .... .......... ...... ........ ...... ..... ...... ..... ..... .... ........ ...... .</text:p>
        <text:p text:style-name="P24">Bibliografia</text:p>
        <text:list xml:id="list3491757262" text:style-name="WWNum2">
          <text:list-item>
            <text:p text:style-name="P34">Kimball, R., &amp; Caserta, J. (2004). <text:span text:style-name="Emphasis">The Data Warehouse ETL Toolkit</text:span>. Wiley.</text:p>
          </text:list-item>
          <text:list-item>
            <text:p text:style-name="P34">Inmon, W. H. (2005). <text:span text:style-name="Emphasis">Building the Data Warehouse</text:span>. Wiley.</text:p>
          </text:list-item>
          <text:list-item>
            <text:p text:style-name="P34">Silberschatz, A., Korth, H., &amp; Sudarshan, S. (2019). <text:span text:style-name="Emphasis">Database System Concepts</text:span>. McGraw-Hill.</text:p>
          </text:list-item>
          <text:list-item>
            <text:p text:style-name="P34">Vassiliadis, P. (2009). <text:span text:style-name="Emphasis">A Survey of Extract-Transform-Load Technology</text:span>. International Journal of Data Warehousing and Mining.</text:p>
          </text:list-item>
          <text:list-item>
            <text:p text:style-name="P33"><text:span text:style-name="T19">Chen, H., Chiang, R., &amp; Storey, V. (2012). </text:span><text:span text:style-name="Emphasis"><text:span text:style-name="T19">Business Intelligence and Analytics: From Big Data to Big Impact</text:span></text:span><text:span text:style-name="T19">. MIS Quarterly.</text:span></text:p>
          </text:list-item>
          <text:list-item>
            <text:p text:style-name="P33"><text:span text:style-name="T19">Ascarza, E. et al. (2017). </text:span><text:span text:style-name="Emphasis"><text:span text:style-name="T19">In Pursuit of Enhanced Customer Retention Management</text:span></text:span><text:span text:style-name="T19">. Customer Needs and Solutions. Harvard Business School. </text:span></text:p>
          </text:list-item>
          <text:list-item>
            <text:p text:style-name="P33"><text:span text:style-name="T19">Min, S., Zhang, X., Kim, N., &amp; Srivastava, R. K. (2016). </text:span><text:span text:style-name="Emphasis"><text:span text:style-name="T19">Customer </text:span></text:span><text:soft-page-break/><text:span text:style-name="Emphasis"><text:span text:style-name="T19">Acquisition and Retention Spending: An Analytical Model and Empirical Investigation in Wireless Telecommunications Markets</text:span></text:span><text:span text:style-name="T19">. Journal of Marketing Research. </text:span></text:p>
          </text:list-item>
        </text:list>
        <text:p text:style-name="P20"/>
      </text:section>
      <text:section text:style-name="Sect2" text:name="Sección1">
        <text:p text:style-name="P30">APÈNDIX</text:p>
        <text:p text:style-name="P24">A1. Secció d’apèndix</text:p>
        <text:p text:style-name="P27">..... .... .... .......... ...... ........ ...... ..... ...... ..... ..... .... .......... ...... ........ ............ ........ ...... ..... ...... ..... ..... .... .... .......... ...... ........ ...... ..... ...... ..... ..... .... .... .......... ...... ........ ...... ..... ...... ..... ..... .... ........ ...... .</text:p>
        <text:p text:style-name="P24">A2. Secció d’apèndix</text:p>
        <text:p text:style-name="P27">..... .... .... .......... ...... ........ ...... ..... ...... ..... ..... .... .......... ...... ........ ............ ........ ...... ..... ...... ..... ..... .... .... .......... ...... ........ ...... ..... ...... ..... ..... .... .... .......... ...... ........ ...... ..... ...... ..... ..... .... ........ ......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Normal" style:font-family-generic="roman" style:font-pitch="variable" style:font-charset="x-symbol"/>
    <style:font-face style:name="HELVETICA" svg:font-family="HELVETICA" style:font-family-generic="swiss"/>
    <style:font-face style:name="Arial" svg:font-family="Arial" style:font-family-generic="roman" style:font-pitch="variable"/>
    <style:font-face style:name="Helvetica1" svg:font-family="Helvetica" style:font-family-generic="roman" style:font-pitch="variable"/>
    <style:font-face style:name="Helvetica Condensed" svg:font-family="'Helvetica Condensed'"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 svg:font-family="Palatino" style:font-family-generic="roman" style:font-pitch="variable"/>
    <style:font-face style:name="Palatino Linotype" svg:font-family="'Palatino Linotype'"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Helvetica" svg:font-family="Helvetic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0.406cm" fo:text-align="justify" style:justify-single-word="false" fo:orphans="0" fo:widows="0" fo:hyphenation-ladder-count="no-limit" style:writing-mode="lr-tb"/>
      <style:text-properties style:use-window-font-color="true" loext:opacity="0%" style:font-name="Palatino" fo:font-family="Palatino" style:font-family-generic="roman" style:font-pitch="variable" fo:font-size="9.5pt" fo:language="en" fo:country="US" style:letter-kerning="true" style:font-name-asian="Times New Roman2" style:font-family-asian="'Times New Roman'" style:font-family-generic-asian="system" style:font-pitch-asian="variable" style:font-size-asian="9.5pt" style:language-asian="en" style:country-asian="US"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PARAGRAPH" style:next-style-name="PARAGRAPH_20__28_no_20_indent_29_" style:default-outline-level="1" style:list-style-name="" style:class="text">
      <style:paragraph-properties fo:margin-left="0.564cm" fo:margin-right="0cm" fo:margin-top="0.564cm" fo:margin-bottom="0.141cm" style:contextual-spacing="false" fo:line-height="0.459cm" fo:text-align="start" style:justify-single-word="false" fo:hyphenation-ladder-count="no-limit" fo:text-indent="-0.564cm" style:auto-text-indent="false" fo:keep-with-next="always"/>
      <style:text-properties fo:font-variant="small-caps" style:font-name="Helvetica" fo:font-family="Helvetica" style:font-family-generic="swiss" style:font-pitch="variable" fo:font-size="11.5pt" fo:font-weight="bold" style:font-size-asian="11.5pt" style:font-weight-asian="bold" fo:hyphenate="false" fo:hyphenation-remain-char-count="2" fo:hyphenation-push-char-count="2" loext:hyphenation-no-caps="false"/>
    </style:style>
    <style:style style:name="Heading_20_2" style:display-name="Heading 2" style:family="paragraph" style:parent-style-name="Heading_20_1" style:next-style-name="PARAGRAPH_20__28_no_20_indent_29_" style:default-outline-level="2" style:list-style-name="" style:class="text">
      <style:paragraph-properties fo:margin-left="0.635cm" fo:margin-right="0cm" fo:margin-top="0.282cm" fo:margin-bottom="0.071cm" style:contextual-spacing="false" fo:line-height="0.388cm" fo:text-indent="-0.635cm" style:auto-text-indent="false"/>
      <style:text-properties fo:font-variant="normal" fo:text-transform="none" fo:font-size="10pt" style:font-size-asian="10pt"/>
    </style:style>
    <style:style style:name="Heading_20_3" style:display-name="Heading 3" style:family="paragraph" style:parent-style-name="Heading_20_2" style:next-style-name="PARAGRAPH_20__28_no_20_indent_29_" style:default-outline-level="3" style:list-style-name="" style:class="text">
      <style:paragraph-properties fo:margin-left="0.917cm" fo:margin-right="0cm" fo:text-indent="-0.917cm" style:auto-text-indent="false"/>
      <style:text-properties fo:font-style="italic" fo:font-weight="normal" style:font-style-asian="italic" style:font-weight-asian="normal"/>
    </style:style>
    <style:style style:name="Heading_20_4" style:display-name="Heading 4" style:family="paragraph" style:parent-style-name="Standard" style:next-style-name="PARAGRAPH_20__28_no_20_indent_29_" style:default-outline-level="4" style:list-style-name="" style:class="text">
      <style:paragraph-properties fo:margin-left="0.635cm" fo:margin-right="0cm" fo:line-height="0.423cm" fo:text-indent="0.381cm" style:auto-text-indent="false"/>
      <style:text-properties style:font-name="Times New Roman" fo:font-family="'Times New Roman'" style:font-family-generic="roman" style:font-pitch="variable" fo:font-size="12pt" style:text-underline-style="solid" style:text-underline-width="auto" style:text-underline-color="font-color" style:font-size-asian="12pt"/>
    </style:style>
    <style:style style:name="PARAGRAPH" style:family="paragraph" style:parent-style-name="Standard" style:default-outline-level="">
      <style:paragraph-properties fo:margin-left="0cm" fo:margin-right="0cm" fo:text-indent="0.423cm" style:auto-text-indent="false"/>
    </style:style>
    <style:style style:name="PARAGRAPH_20__28_no_20_indent_29_" style:display-name="PARAGRAPH (no indent)" style:family="paragraph" style:parent-style-name="PARAGRAPH" style:next-style-name="PARAGRAPH" style:default-outline-level="">
      <style:paragraph-properties fo:margin-left="0cm" fo:margin-right="0cm" fo:text-indent="0cm" style:auto-text-indent="false"/>
    </style:style>
    <style:style style:name="Footnote" style:family="paragraph" style:parent-style-name="PARAGRAPH_20__28_no_20_indent_29_" style:default-outline-level="" style:class="extra">
      <style:paragraph-properties fo:margin-left="0cm" fo:margin-right="0cm" fo:line-height="0.3cm" fo:text-indent="0.254cm" style:auto-text-indent="false"/>
      <style:text-properties fo:font-size="7.5pt" style:font-size-asian="7.5pt"/>
    </style:style>
    <style:style style:name="ARTICLE_20_TITLE" style:display-name="ARTICLE TITLE" style:family="paragraph" style:parent-style-name="PARAGRAPH_20__28_no_20_indent_29_" style:default-outline-level="">
      <style:paragraph-properties fo:margin-top="0cm" fo:margin-bottom="0.282cm" style:contextual-spacing="false" fo:line-height="0.988cm" fo:text-align="center" style:justify-single-word="false" fo:hyphenation-ladder-count="no-limit"/>
      <style:text-properties style:font-name="Helvetica1" fo:font-family="Helvetica" style:font-family-generic="roman" style:font-pitch="variable" fo:font-size="24pt" fo:letter-spacing="0.011cm" style:font-size-asian="24pt" fo:hyphenate="false" fo:hyphenation-remain-char-count="2" fo:hyphenation-push-char-count="2" loext:hyphenation-no-caps="false"/>
    </style:style>
    <style:style style:name="AUTHOR" style:family="paragraph" style:parent-style-name="ARTICLE_20_TITLE" style:next-style-name="Standard" style:default-outline-level="">
      <style:paragraph-properties fo:margin-top="0cm" fo:margin-bottom="0.847cm" style:contextual-spacing="false" fo:line-height="0.494cm"/>
      <style:text-properties fo:font-size="11pt" fo:letter-spacing="0.009cm" style:font-size-asian="11pt"/>
    </style:style>
    <style:style style:name="TABLE_20_FOOTNOTE" style:display-name="TABLE FOOTNOTE" style:family="paragraph" style:parent-style-name="Standard" style:default-outline-level="">
      <style:paragraph-properties fo:text-align="start" style:justify-single-word="false"/>
      <style:text-properties fo:font-size="8pt" fo:font-style="italic" style:font-size-asian="8pt" style:font-style-asian="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0.388cm">
        <style:tab-stops>
          <style:tab-stop style:position="17.992cm" style:type="right"/>
        </style:tab-stops>
      </style:paragraph-properties>
      <style:text-properties fo:text-transform="uppercase" style:font-name="Helvetica1" fo:font-family="Helvetica" style:font-family-generic="roman" style:font-pitch="variable" fo:font-size="7pt" style:font-size-asian="7pt"/>
    </style:style>
    <style:style style:name="ABSTRACT" style:family="paragraph" style:parent-style-name="PARAGRAPH" style:default-outline-level="">
      <style:paragraph-properties fo:margin-left="0.847cm" fo:margin-right="0.847cm" fo:margin-top="0cm" fo:margin-bottom="0.423cm" style:contextual-spacing="false" fo:line-height="0.37cm" fo:text-align="start" style:justify-single-word="false" fo:hyphenation-ladder-count="no-limit" fo:text-indent="0cm" style:auto-text-indent="false"/>
      <style:text-properties style:font-name="Helvetica1" fo:font-family="Helvetica" style:font-family-generic="roman" style:font-pitch="variable" fo:font-size="8pt" style:font-size-asian="8pt" fo:hyphenate="false" fo:hyphenation-remain-char-count="2" fo:hyphenation-push-char-count="2" loext:hyphenation-no-caps="false"/>
    </style:style>
    <style:style style:name="TABLE_20_ROW" style:display-name="TABLE ROW" style:family="paragraph" style:parent-style-name="Standard" style:default-outline-level="">
      <style:paragraph-properties fo:margin-top="0.035cm" fo:margin-bottom="0.035cm" style:contextual-spacing="false" fo:line-height="0.318cm" fo:text-align="center" style:justify-single-word="false"/>
      <style:text-properties style:font-name="Helvetica1" fo:font-family="Helvetica" style:font-family-generic="roman" style:font-pitch="variable" fo:font-size="8pt" style:font-size-asian="8pt"/>
    </style:style>
    <style:style style:name="TABLE_20_COLUMN_20_HEADER" style:display-name="TABLE COLUMN HEADER" style:family="paragraph" style:parent-style-name="TABLE_20_ROW" style:next-style-name="TABLE_20_ROW" style:default-outline-level="">
      <style:paragraph-properties fo:margin-top="0.071cm" fo:margin-bottom="0.071cm" style:contextual-spacing="false"/>
      <style:text-properties fo:font-size="9pt" style:font-size-asian="9pt"/>
    </style:style>
    <style:style style:name="TABLE_20_TITLE" style:display-name="TABLE TITLE" style:family="paragraph" style:parent-style-name="Standard" style:next-style-name="TABLE_20_COLUMN_20_HEADER" style:default-outline-level="">
      <style:paragraph-properties fo:margin-top="0cm" fo:margin-bottom="0.141cm" style:contextual-spacing="false" fo:line-height="0.353cm" fo:text-align="center" style:justify-single-word="false" fo:keep-with-next="always"/>
      <style:text-properties fo:font-variant="small-caps" fo:color="#000000" loext:opacity="100%" style:font-name="Helvetica1" fo:font-family="Helvetica" style:font-family-generic="roman" style:font-pitch="variable"/>
    </style:style>
    <style:style style:name="FIGURE_20_CAPTION" style:display-name="FIGURE CAPTION" style:family="paragraph" style:parent-style-name="PARAGRAPH_20__28_no_20_indent_29_" style:default-outline-level="">
      <style:paragraph-properties fo:margin-top="0cm" fo:margin-bottom="0.564cm" style:contextual-spacing="false" fo:line-height="0.318cm"/>
      <style:text-properties style:font-name="Helvetica1" fo:font-family="Helvetica" style:font-family-generic="roman" style:font-pitch="variable" fo:font-size="8pt" style:font-size-asian="8pt"/>
    </style:style>
    <style:style style:name="QUOTATION_20_BLOCK_20_STYLE" style:display-name="QUOTATION BLOCK STYLE" style:family="paragraph" style:parent-style-name="PARAGRAPH_20__28_no_20_indent_29_" style:default-outline-level="">
      <style:paragraph-properties fo:margin-left="0.423cm" fo:margin-right="0.423cm" fo:margin-top="0.141cm" fo:margin-bottom="0.141cm" style:contextual-spacing="false" fo:text-indent="0cm" style:auto-text-indent="false"/>
      <style:text-properties fo:font-size="8pt" style:font-size-asian="8pt"/>
    </style:style>
    <style:style style:name="LIST_20_TYPE_20_2a_20__28_Number_29_" style:display-name="LIST TYPE 2a (Number)" style:family="paragraph" style:parent-style-name="LIST_20_TYPE_20_2_20__28_Number_29_" style:next-style-name="LIST_20_TYPE_20_2_20__28_Number_29_" style:default-outline-level="">
      <style:paragraph-properties fo:margin-top="0.141cm" fo:margin-bottom="0.353cm" style:contextual-spacing="false"/>
    </style:style>
    <style:style style:name="LIST_20_TYPE_20_2_20__28_Number_29_" style:display-name="LIST TYPE 2 (Number)" style:family="paragraph" style:parent-style-name="LIST_20_TYPE_20_1_20__28_Bullet_29_" style:default-outline-level=""/>
    <style:style style:name="LIST_20_TYPE_20_1_20__28_Bullet_29_" style:display-name="LIST TYPE 1 (Bullet)" style:family="paragraph" style:parent-style-name="PARAGRAPH" style:default-outline-level="" style:list-style-name="WWNum1">
      <style:paragraph-properties fo:margin-left="0.847cm" fo:margin-right="0cm" fo:text-indent="-0.423cm" style:auto-text-indent="false">
        <style:tab-stops/>
      </style:paragraph-properties>
    </style:style>
    <style:style style:name="BIB._20_REF._20_TEXT" style:display-name="BIB. REF. TEXT" style:family="paragraph" style:parent-style-name="PARAGRAPH_20__28_no_20_indent_29_" style:default-outline-level="">
      <style:paragraph-properties fo:margin-left="0.635cm" fo:margin-right="0cm" fo:line-height="0.318cm" fo:orphans="2" fo:widows="2" fo:text-indent="-0.635cm" style:auto-text-indent="false">
        <style:tab-stops>
          <style:tab-stop style:position="0.762cm"/>
        </style:tab-stops>
      </style:paragraph-properties>
      <style:text-properties fo:font-size="8pt" style:font-size-asian="8pt"/>
    </style:style>
    <style:style style:name="CCC_20_LINE" style:display-name="CCC LINE" style:family="paragraph" style:parent-style-name="PARAGRAPH_20__28_no_20_indent_29_" style:default-outline-level="">
      <style:paragraph-properties fo:line-height="0.282cm" fo:text-align="center" style:justify-single-word="false"/>
      <style:text-properties style:font-name="Helvetica1" fo:font-family="Helvetica" style:font-family-generic="roman" style:font-pitch="variable" fo:font-size="6pt" fo:letter-spacing="0.011cm" style:font-size-asian="6pt"/>
    </style:style>
    <style:style style:name="PROGRAM_20_SEGMENT" style:display-name="PROGRAM SEGMENT" style:family="paragraph" style:parent-style-name="PARAGRAPH_20__28_no_20_indent_29_" style:default-outline-level="">
      <style:paragraph-properties fo:margin-left="0.423cm" fo:margin-right="0.423cm" fo:line-height="0.353cm" fo:text-align="start" style:justify-single-word="false" fo:text-indent="0cm" style:auto-text-indent="false">
        <style:tab-stops>
          <style:tab-stop style:position="0.353cm"/>
          <style:tab-stop style:position="0.706cm"/>
          <style:tab-stop style:position="1.058cm"/>
          <style:tab-stop style:position="1.411cm"/>
          <style:tab-stop style:position="1.764cm"/>
          <style:tab-stop style:position="2.117cm"/>
          <style:tab-stop style:position="2.469cm"/>
          <style:tab-stop style:position="2.822cm"/>
          <style:tab-stop style:position="3.175cm"/>
          <style:tab-stop style:position="3.528cm"/>
          <style:tab-stop style:position="3.881cm"/>
          <style:tab-stop style:position="4.233cm"/>
          <style:tab-stop style:position="4.586cm"/>
          <style:tab-stop style:position="4.939cm"/>
          <style:tab-stop style:position="5.292cm"/>
          <style:tab-stop style:position="5.644cm"/>
          <style:tab-stop style:position="5.997cm"/>
          <style:tab-stop style:position="6.35cm"/>
          <style:tab-stop style:position="6.703cm"/>
          <style:tab-stop style:position="7.056cm"/>
          <style:tab-stop style:position="7.408cm"/>
          <style:tab-stop style:position="7.761cm"/>
          <style:tab-stop style:position="8.114cm"/>
          <style:tab-stop style:position="8.467cm"/>
          <style:tab-stop style:position="8.819cm"/>
        </style:tab-stops>
      </style:paragraph-properties>
      <style:text-properties style:font-name="ProgramThree" fo:font-family="ProgramThree" style:font-family-generic="roman" style:font-pitch="variable" fo:font-size="9pt" style:font-size-asian="9pt"/>
    </style:style>
    <style:style style:name="LIST_20_TYPE_20_1a_20__28_Bullet_29_" style:display-name="LIST TYPE 1a (Bullet)" style:family="paragraph" style:parent-style-name="LIST_20_TYPE_20_1_20__28_Bullet_29_" style:next-style-name="LIST_20_TYPE_20_1_20__28_Bullet_29_" style:default-outline-level="">
      <style:paragraph-properties fo:margin-top="0.141cm" fo:margin-bottom="0.353cm" style:contextual-spacing="false"/>
    </style:style>
    <style:style style:name="LIST_20_TYPE_20_2z_20__28_Number_29_" style:display-name="LIST TYPE 2z (Number)" style:family="paragraph" style:parent-style-name="LIST_20_TYPE_20_2_20__28_Number_29_" style:next-style-name="PARAGRAPH" style:default-outline-level="">
      <style:paragraph-properties fo:margin-top="0cm" fo:margin-bottom="0.141cm" style:contextual-spacing="false"/>
    </style:style>
    <style:style style:name="VITA" style:family="paragraph" style:parent-style-name="PARAGRAPH_20__28_no_20_indent_29_" style:default-outline-level="">
      <style:paragraph-properties fo:line-height="0.318cm">
        <style:tab-stops>
          <style:tab-stop style:position="0.381cm"/>
        </style:tab-stops>
      </style:paragraph-properties>
      <style:text-properties style:font-name="Helvetica1" fo:font-family="Helvetica" style:font-family-generic="roman" style:font-pitch="variable" fo:font-size="8pt" style:font-size-asian="8pt"/>
    </style:style>
    <style:style style:name="LIST_20_TYPE_20_1z_20__28_Bullet_29_" style:display-name="LIST TYPE 1z (Bullet)" style:family="paragraph" style:parent-style-name="LIST_20_TYPE_20_1_20__28_Bullet_29_" style:next-style-name="PARAGRAPH" style:default-outline-level="">
      <style:paragraph-properties fo:margin-top="0cm" fo:margin-bottom="0.141cm" style:contextual-spacing="false"/>
    </style:style>
    <style:style style:name="FIGURE_20_BODY" style:display-name="FIGURE BODY" style:family="paragraph" style:parent-style-name="PROGRAM_20_SEGMENT" style:default-outline-level="">
      <style:paragraph-properties fo:line-height="0.318cm"/>
      <style:text-properties style:font-name="Palatino" fo:font-family="Palatino" style:font-family-generic="roman" style:font-pitch="variable" fo:font-size="8pt" style:font-size-asian="8pt"/>
    </style:style>
    <style:style style:name="FORMULA" style:family="paragraph" style:parent-style-name="Standard" style:default-outline-level="">
      <style:paragraph-properties fo:margin-top="0.141cm" fo:margin-bottom="0.141cm" style:contextual-spacing="false" style:line-height-at-least="0.423cm" fo:text-align="center" style:justify-single-word="fals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ACK._20_HEAD" style:display-name="ACK. HEAD" style:family="paragraph" style:parent-style-name="Heading_20_1" style:next-style-name="ACKNOWLEDGMENTS" style:default-outline-level=""/>
    <style:style style:name="ACKNOWLEDGMENTS" style:family="paragraph" style:parent-style-name="PARAGRAPH_20__28_no_20_indent_29_" style:default-outline-level=""/>
    <style:style style:name="ART" style:family="paragraph" style:parent-style-name="Standard" style:next-style-name="Standard" style:default-outline-level="">
      <style:paragraph-properties fo:margin-top="0.423cm" fo:margin-bottom="0.282cm" style:contextual-spacing="false" style:line-height-at-least="0.388cm" fo:text-align="center" style:justify-single-word="false" fo:keep-with-next="always"/>
    </style:style>
    <style:style style:name="AUTHOR_20_AFFILIATION" style:display-name="AUTHOR AFFILIATION" style:family="paragraph" style:parent-style-name="PARAGRAPH_20__28_no_20_indent_29_" style:default-outline-level="">
      <style:paragraph-properties fo:line-height="0.318cm"/>
      <style:text-properties fo:font-size="8pt" fo:font-style="italic" style:font-size-asian="8pt" style:font-style-asian="italic"/>
    </style:style>
    <style:style style:name="BIB._20_HEAD" style:display-name="BIB. HEAD" style:family="paragraph" style:parent-style-name="Heading_20_1" style:next-style-name="BIB._20_REF._20_TEXT" style:default-outline-level=""/>
    <style:style style:name="CONCLUSION" style:family="paragraph" style:parent-style-name="PARAGRAPH_20__28_no_20_indent_29_" style:next-style-name="PARAGRAPH" style:default-outline-level=""/>
    <style:style style:name="FOOTNOTE" style:family="paragraph" style:parent-style-name="Footnote" style:default-outline-level=""/>
    <style:style style:name="INTRODUCTION" style:family="paragraph" style:parent-style-name="PARAGRAPH_20__28_no_20_indent_29_" style:next-style-name="PARAGRAPH" style:default-outline-level=""/>
    <style:style style:name="KEY_20_WORD" style:display-name="KEY WORD" style:family="paragraph" style:parent-style-name="ABSTRACT" style:next-style-name="Standard" style:default-outline-level="">
      <style:paragraph-properties fo:margin-top="0cm" fo:margin-bottom="0cm" style:contextual-spacing="false"/>
    </style:style>
    <style:style style:name="Figure_20_Caption" style:display-name="Figure Caption"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ext" style:family="paragraph" style:parent-style-name="Standard" style:default-outline-level="" style:class="extra">
      <style:paragraph-properties fo:margin-left="0cm" fo:margin-right="0cm" fo:line-height="105%" fo:text-indent="0.356cm" style:auto-text-indent="false"/>
      <style:text-properties style:font-name="Times New Roman" fo:font-family="'Times New Roman'" style:font-family-generic="roman" style:font-pitch="variable" fo:font-size="10pt" style:letter-kerning="false" style:font-size-asian="10pt"/>
    </style:style>
    <style:style style:name="Equation" style:family="paragraph" style:parent-style-name="Standard" style:next-style-name="Standard" style:default-outline-level="">
      <style:paragraph-properties fo:line-height="105%">
        <style:tab-stops>
          <style:tab-stop style:position="8.89cm" style:type="right"/>
        </style:tab-stops>
      </style:paragraph-properties>
      <style:text-properties style:font-name="Times New Roman" fo:font-family="'Times New Roman'" style:font-family-generic="roman" style:font-pitch="variable" fo:font-size="10pt" style:letter-kerning="false" style:font-size-asian="10pt"/>
    </style:style>
    <style:style style:name="Reference_20_Head" style:display-name="Reference Head" style:family="paragraph" style:parent-style-name="Heading_20_1" style:default-outline-level="">
      <style:paragraph-properties fo:margin-left="0cm" fo:margin-right="0cm" fo:margin-top="0.423cm" fo:margin-bottom="0.141cm" style:contextual-spacing="false" fo:line-height="100%" fo:text-align="center" style:justify-single-word="false" fo:orphans="2" fo:widows="2" fo:hyphenation-ladder-count="no-limit" fo:text-indent="0cm" style:auto-text-indent="false"/>
      <style:text-properties style:font-name="Times New Roman1" fo:font-family="'Times New Roman'" style:font-family-generic="swiss" style:font-pitch="variable" fo:font-size="10pt" fo:font-weight="normal" style:letter-kerning="true" style:font-size-asian="10pt" style:font-weight-asian="normal" fo:hyphenate="true" fo:hyphenation-remain-char-count="2" fo:hyphenation-push-char-count="2" loext:hyphenation-no-caps="false"/>
    </style:style>
    <style:style style:name="References"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able_20_Title" style:display-name="Table Title" style:family="paragraph" style:parent-style-name="Standard" style:default-outline-level="">
      <style:paragraph-properties fo:line-height="100%" fo:text-align="center" style:justify-single-word="false" fo:orphans="2" fo:widows="2"/>
      <style:text-properties fo:font-variant="small-caps" style:font-name="Times New Roman" fo:font-family="'Times New Roman'" style:font-family-generic="roman" style:font-pitch="variable" fo:font-size="8pt" style:letter-kerning="false" style:font-size-asian="8pt"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fo:text-align="start" style:justify-single-word="false" fo:orphans="2" fo:widows="2"/>
      <style:text-properties style:font-name="Arial" fo:font-family="Arial" style:font-family-generic="roman" style:font-pitch="variable" fo:font-size="12pt" style:letter-kerning="false" style:font-name-asian="Arial Unicode MS" style:font-family-asian="'Arial Unicode MS'" style:font-family-generic-asian="system" style:font-pitch-asian="variable" style:font-size-asian="12pt" style:font-name-complex="Arial1" style:font-family-complex="Arial"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Palatino" fo:font-family="Palatino" style:font-family-generic="roman" style:font-pitch="variable" fo:font-size="9.5pt" fo:language="en" fo:country="US" style:letter-kerning="true" style:font-name-asian="Times New Roman2" style:font-family-asian="'Times New Roman'" style:font-family-generic-asian="system" style:font-pitch-asian="variable" style:font-size-asian="9.5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Program_20_Code" style:display-name="Program Code" style:family="text">
      <style:text-properties fo:color="#008080" loext:opacity="100%" style:font-name="ProgramThree" fo:font-family="ProgramThree" style:font-family-generic="roman" style:font-pitch="variable" fo:font-size="9pt" style:font-size-asian="9pt"/>
    </style:style>
    <style:style style:name="Table_20__28_reference_20_to_29_" style:display-name="Table (reference to)" style:family="text">
      <style:text-properties fo:color="#00ff00" loext:opacity="100%"/>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Url" style:family="text" style:parent-style-name="Default_20_Paragraph_20_Font">
      <style:text-properties fo:color="#008000" loext:opacity="100%" style:font-name="Helvetica Condensed" fo:font-family="'Helvetica Condensed'" style:font-family-generic="roman" style:font-pitch="variable" fo:font-size="9pt" style:font-size-asian="9pt"/>
    </style:style>
    <style:style style:name="page_20_number" style:display-name="page number" style:family="text" style:parent-style-name="Default_20_Paragraph_20_Font"/>
    <style:style style:name="Bib._20_Ref." style:display-name="Bib. Ref." style:family="text">
      <style:text-properties fo:color="#800080" loext:opacity="100%"/>
    </style:style>
    <style:style style:name="Figure_20__28_reference_20_to_29_" style:display-name="Figure (reference to)" style:family="text">
      <style:text-properties fo:color="#ff0000" loext:opacity="100%"/>
    </style:style>
    <style:style style:name="Footnote_20__28_reference_20_to_29_" style:display-name="Footnote (reference to)" style:family="text" style:parent-style-name="Footnote_20_Characters">
      <style:text-properties fo:color="#008000" loext:opacity="100%" style:text-position="super 58%" fo:font-size="12.5pt" style:font-size-asian="12.5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Internet_20_link" style:display-name="Internet link" style:family="text" style:parent-style-name="Default_20_Paragraph_20_Font">
      <style:text-properties fo:color="#003399" loext:opacity="100%"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Palatino" fo:font-family="Palatino" style:font-family-generic="roman" style:font-pitch="variable" style:letter-kerning="true"/>
    </style:style>
    <style:style style:name="Asunto_20_del_20_comentario_20_Car" style:display-name="Asunto del comentario Car" style:family="text" style:parent-style-name="Texto_20_comentario_20_Car">
      <style:text-properties style:font-name="Palatino" fo:font-family="Palatino" style:font-family-generic="roman" style:font-pitch="variable" fo:font-weight="bold" style:letter-kerning="true"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016cm" fo:text-indent="-0.508cm" fo:margin-left="0.889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fo:line-height="0.318cm">
        <style:tab-stops>
          <style:tab-stop style:position="18.203cm" style:type="right"/>
        </style:tab-stops>
      </style:paragraph-properties>
    </style:style>
    <style:style style:name="MP2" style:family="paragraph" style:parent-style-name="Header">
      <style:paragraph-properties fo:margin-top="0cm" fo:margin-bottom="0.353cm" style:contextual-spacing="false" fo:line-height="0.318cm">
        <style:tab-stops>
          <style:tab-stop style:position="18.203cm" style:type="right"/>
        </style:tab-stops>
      </style:paragraph-properties>
      <style:text-properties officeooo:paragraph-rsid="000cda5d"/>
    </style:style>
    <style:style style:name="MP3" style:family="paragraph" style:parent-style-name="Standard">
      <style:paragraph-properties fo:margin-top="0cm" fo:margin-bottom="0.353cm" style:contextual-spacing="false" fo:line-height="0.035cm" fo:text-align="center" style:justify-single-word="false"/>
      <style:text-properties style:font-name="Arial"/>
    </style:style>
    <style:style style:name="MP4" style:family="paragraph" style:parent-style-name="Standard">
      <style:paragraph-properties fo:margin-top="0cm" fo:margin-bottom="0.353cm" style:contextual-spacing="false" fo:line-height="0.035cm" fo:text-align="center" style:justify-single-word="false"/>
    </style:style>
    <style:style style:name="MP5" style:family="paragraph" style:parent-style-name="Footer">
      <style:paragraph-properties fo:margin-top="0cm" fo:margin-bottom="0.353cm" style:contextual-spacing="false" fo:line-height="0.035cm" fo:text-align="center" style:justify-single-word="false"/>
    </style:style>
    <style:style style:name="MT1" style:family="text">
      <style:text-properties fo:font-variant="normal" fo:text-transform="none" fo:font-style="italic" style:font-style-asian="italic" text:display="none"/>
    </style:style>
    <style:style style:name="MT2" style:family="text">
      <style:text-properties fo:font-variant="normal" fo:text-transform="none" text:display="none"/>
    </style:style>
    <style:style style:name="MT3" style:family="text">
      <style:text-properties fo:language="es" fo:country="ES" fo:font-style="italic" fo:font-weight="bold" style:font-style-asian="italic" style:font-weight-asian="bold" text:display="none"/>
    </style:style>
    <style:style style:name="MT4" style:family="text">
      <style:text-properties fo:font-variant="normal" fo:text-transform="none" fo:language="es" fo:country="ES" fo:font-style="italic" style:font-style-asian="italic" text:display="none"/>
    </style:style>
    <style:style style:name="MT5" style:family="text">
      <style:text-properties fo:language="es" fo:country="ES"/>
    </style:style>
    <style:style style:name="MT6" style:family="text">
      <style:text-properties fo:color="#000000" loext:opacity="100%" fo:language="ca" fo:country="ES"/>
    </style:style>
    <style:style style:name="MT7" style:family="text">
      <style:text-properties fo:language="ca" fo:country="ES"/>
    </style:style>
    <style:style style:name="MT8" style:family="text">
      <style:text-properties fo:font-variant="normal" fo:text-transform="none" fo:font-size="8pt" fo:language="es" fo:country="ES" fo:font-weight="bold" style:font-size-asian="8pt" style:font-weight-asian="bold" text:display="none"/>
    </style:style>
    <style:style style:name="MT9" style:family="text">
      <style:text-properties fo:font-variant="normal" fo:text-transform="none" fo:language="es" fo:country="ES" text:display="none"/>
    </style:style>
    <style:style style:name="MT10" style:family="text">
      <style:text-properties fo:text-transform="uppercase" fo:font-size="7pt" style:letter-kerning="true" style:font-size-asian="7pt"/>
    </style:style>
    <style:style style:name="MT11" style:family="text">
      <style:text-properties fo:text-transform="uppercase" fo:color="#000000" loext:opacity="100%" fo:font-size="7pt" fo:language="ca" fo:country="ES" style:letter-kerning="true" style:font-size-asian="7pt"/>
    </style:style>
    <style:page-layout style:name="Mpm1" style:page-usage="mirrored">
      <style:page-layout-properties fo:page-width="20.001cm" fo:page-height="27.3cm" style:num-format="1" style:print-orientation="portrait" fo:margin-top="1.071cm" fo:margin-bottom="0.131cm" fo:margin-left="1.27cm" fo:margin-right="1.071cm" style:writing-mode="lr-tb" style:layout-grid-color="#c0c0c0" style:layout-grid-lines="139"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header-footer-properties fo:min-height="0.499cm" fo:margin-left="0cm" fo:margin-right="0cm" fo:margin-top="0.399cm" style:dynamic-spacing="true"/>
      </style:footer-style>
    </style:page-layout>
    <style:page-layout style:name="Mpm2" style:page-usage="mirrored">
      <style:page-layout-properties fo:page-width="20.001cm" fo:page-height="27.3cm" style:num-format="1" style:print-orientation="portrait" fo:margin-top="1.071cm" fo:margin-bottom="0.131cm" fo:margin-left="1.27cm" fo:margin-right="1.07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AUTHOR: <text:s/>TITLE<text:tab/><text:span text:style-name="MT1">odd page</text:span><text:span text:style-name="MT2"> <text:s text:c="3"/></text:span><text:page-number text:select-page="current">3</text:page-number></text:p>
      </style:header>
      <style:header-left>
        <text:p text:style-name="MP2"><text:page-number text:select-page="current">2</text:page-number><text:span text:style-name="MT3"><text:s text:c="3"/></text:span><text:span text:style-name="MT4">even page</text:span><text:span text:style-name="MT5"><text:tab/>EE/UAB TFG: </text:span><text:span text:style-name="MT6">Construcció d’una ETL per a la consolidació de prospecció comercial</text:span></text:p>
      </style:header-left>
      <style:footer>
        <text:p text:style-name="MP3"/>
      </style:footer>
      <style:footer-left>
        <text:p text:style-name="MP4"/>
      </style:footer-left>
    </style:master-page>
    <style:master-page style:name="First_20_Page" style:display-name="First Page" style:page-layout-name="Mpm1" style:next-style-name="Standard">
      <style:header>
        <text:p text:style-name="MP1"><text:span text:style-name="MT7">TFG EN ENGINYERIA DADES, ESCOLA D’ENGINYERIA (EE), UNIversitat autònoma de barcelona (uab)</text:span><text:span text:style-name="MT5"><text:tab/></text:span><text:span text:style-name="MT8">first page</text:span><text:span text:style-name="MT9"> <text:s text:c="2"/></text:span><text:page-number text:select-page="current">1</text:page-number></text:p>
      </style:header>
      <style:footer>
        <text:p text:style-name="MP5"/>
      </style:footer>
    </style:master-page>
    <style:master-page style:name="Converted1" style:page-layout-name="Mpm2">
      <style:header>
        <text:p text:style-name="MP1"><text:span text:style-name="MT10">Dante rodríguez Milán: </text:span><text:span text:style-name="MT11">Construcció d’una ETL per a la consolidació de prospecció comercial</text:span><text:tab/><text:span text:style-name="MT1">odd page</text:span><text:span text:style-name="MT2"> <text:s text:c="3"/></text:span><text:page-number text:select-page="current">0</text:page-number></text:p>
      </style:header>
      <style:header-left>
        <text:p text:style-name="MP1"><text:page-number text:select-page="current">4</text:page-number><text:span text:style-name="MT3"><text:s text:c="3"/></text:span><text:span text:style-name="MT4">even page</text:span><text:span text:style-name="MT5"><text:tab/></text:span><text:span text:style-name="MT7">EE/UAB TFG DADES: títol TREBALL (abreUJAT si És molt llarG)</text:span></text:p>
      </style:header-left>
      <style:footer>
        <text:p text:style-name="MP3"/>
      </style:footer>
      <style:footer-left>
        <text:p text:style-name="MP4"/>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11-09T22:24:00</meta:creation-date>
    <meta:initial-creator>Erin Espriu</meta:initial-creator>
    <dc:description>New styles and page layout for 1996.</dc:description>
    <dc:language>es-ES</dc:language>
    <meta:print-date>2013-11-28T11:41:00</meta:print-date>
    <dc:date>2026-04-19T13:02:37.041000000</dc:date>
    <meta:editing-cycles>60</meta:editing-cycles>
    <dc:title>Transaction / Regular Paper Title</dc:title>
    <meta:editing-duration>PT5H34M49S</meta:editing-duration>
    <meta:generator>LibreOffice/7.0.1.2$Windows_X86_64 LibreOffice_project/7cbcfc562f6eb6708b5ff7d7397325de9e764452</meta:generator>
    <meta:document-statistic meta:table-count="0" meta:image-count="0" meta:object-count="0" meta:page-count="4" meta:paragraph-count="65" meta:word-count="1505" meta:character-count="10326" meta:non-whitespace-character-count="8884"/>
    <meta:user-defined meta:name="AppVersion">15.0000</meta:user-defined>
    <meta:user-defined meta:name="Company">IEEE Computer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rans_final_submission.dot" xlink:href=""/>
  </office:meta>
</office:document-meta>
</file>
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Palatino" svg:font-family="Palatino" style:font-family-generic="roman" style:font-pitch="variable"/>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ProgramThree" svg:font-family="ProgramThree" style:font-family-generic="roman" style:font-pitch="variable"/>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Helvetica Condensed" svg:font-family="Helvetica Condensed"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style:font-face style:name="SimHei" svg:font-family="SimHei" style:font-family-generic="modern" style:font-pitch="fixed" svg:panose-1="2 1 6 0 3 1 1 1 1 1"/>
    <style:font-face style:name="72 Brand Medium" svg:font-family="72 Brand Medium" style:font-family-generic="swiss" style:font-pitch="variable" svg:panose-1="2 11 6 4 3 6 3 2 2 4"/>
    <style:font-face style:name="SimSun" svg:font-family="SimSun" style:font-family-generic="system" style:font-pitch="variable" svg:panose-1="2 1 6 0 3 1 1 1 1 1"/>
    <style:font-face style:name="72 Brand" svg:font-family="72 Brand" style:font-family-generic="swiss" style:font-pitch="variable" svg:panose-1="2 11 5 4 3 6 3 2 2 4"/>
  </office:font-face-decls>
  <office:automatic-styles>
    <style:style style:name="P1" style:parent-style-name="ARTICLETITLE" style:master-page-name="MPF0" style:family="paragraph">
      <style:paragraph-properties fo:break-before="page" fo:margin-bottom="0.0833in"/>
      <style:text-properties fo:color="#000000" fo:language="ca" fo:country="ES"/>
    </style:style>
    <style:style style:name="P18" style:parent-style-name="AUTHOR" style:family="paragraph">
      <style:paragraph-properties fo:margin-top="0.0555in" fo:margin-bottom="0.25in"/>
      <style:text-properties fo:color="#000000" fo:font-size="14pt" style:font-size-asian="14pt" style:font-size-complex="14pt" fo:language="ca" fo:country="ES"/>
    </style:style>
    <style:style style:name="P19" style:parent-style-name="ABSTRACT" style:family="paragraph">
      <style:paragraph-properties fo:line-height="100%" fo:margin-left="0.3347in" fo:margin-right="0.3347in">
        <style:tab-stops/>
      </style:paragraph-properties>
    </style:style>
    <style:style style:name="T20" style:parent-style-name="DefaultParagraphFont" style:family="text">
      <style:text-properties fo:font-weight="bold" style:font-weight-asian="bold" fo:color="#000000" fo:language="ca" fo:country="ES"/>
    </style:style>
    <style:style style:name="T21" style:parent-style-name="DefaultParagraphFont" style:family="text">
      <style:text-properties fo:color="#000000" fo:language="ca" fo:country="ES"/>
    </style:style>
    <style:style style:name="P22" style:parent-style-name="Textbody" style:family="paragraph">
      <style:paragraph-properties fo:line-height="100%" fo:margin-left="0.3347in" fo:margin-right="0.3347in">
        <style:tab-stops/>
      </style:paragraph-properties>
      <style:text-properties style:font-name="Helvetica" fo:color="#000000" fo:font-size="8pt" style:font-size-asian="8pt" style:font-size-complex="8pt" fo:language="ca" fo:country="ES"/>
    </style:style>
    <style:style style:name="P23" style:parent-style-name="ABSTRACT" style:family="paragraph">
      <style:paragraph-properties fo:line-height="100%" fo:margin-left="0.3347in" fo:margin-right="0.3347in">
        <style:tab-stops/>
      </style:paragraph-properties>
      <style:text-properties fo:color="#000000" fo:language="ca" fo:country="ES"/>
    </style:style>
    <style:style style:name="P24" style:parent-style-name="ABSTRACT" style:family="paragraph">
      <style:paragraph-properties fo:line-height="100%" fo:margin-left="0.3347in" fo:margin-right="0.3347in">
        <style:tab-stops/>
      </style:paragraph-properties>
    </style:style>
    <style:style style:name="T25" style:parent-style-name="DefaultParagraphFont" style:family="text">
      <style:text-properties fo:font-weight="bold" style:font-weight-asian="bold" fo:color="#000000" fo:language="ca" fo:country="ES"/>
    </style:style>
    <style:style style:name="T26" style:parent-style-name="DefaultParagraphFont" style:family="text">
      <style:text-properties fo:color="#000000" fo:language="ca" fo:country="ES"/>
    </style:style>
    <style:style style:name="P27" style:parent-style-name="ABSTRACT" style:family="paragraph">
      <style:paragraph-properties fo:line-height="100%" fo:margin-left="0.3347in" fo:margin-right="0.3347in">
        <style:tab-stops/>
      </style:paragraph-properties>
      <style:text-properties fo:color="#000000" fo:language="ca" fo:country="ES"/>
    </style:style>
    <style:style style:name="P28" style:parent-style-name="ABSTRACT" style:family="paragraph">
      <style:paragraph-properties fo:line-height="100%" fo:margin-left="0.3347in" fo:margin-right="0.3347in">
        <style:tab-stops/>
      </style:paragraph-properties>
      <style:text-properties fo:color="#000000" fo:language="ca" fo:country="ES"/>
    </style:style>
    <style:style style:name="P29" style:parent-style-name="ABSTRACT" style:family="paragraph">
      <style:paragraph-properties fo:line-height="100%" fo:margin-left="0.3347in" fo:margin-right="0.3347in">
        <style:tab-stops/>
      </style:paragraph-properties>
    </style:style>
    <style:style style:name="T30" style:parent-style-name="DefaultParagraphFont" style:family="text">
      <style:text-properties fo:font-weight="bold" style:font-weight-asian="bold" fo:color="#000000" fo:language="ca" fo:country="ES"/>
    </style:style>
    <style:style style:name="T31" style:parent-style-name="DefaultParagraphFont" style:family="text">
      <style:text-properties fo:color="#000000" fo:language="ca" fo:country="ES"/>
    </style:style>
    <style:style style:name="P32" style:parent-style-name="ABSTRACT" style:family="paragraph">
      <style:paragraph-properties fo:line-height="100%" fo:margin-left="0.3347in" fo:margin-right="0.3347in">
        <style:tab-stops/>
      </style:paragraph-properties>
      <style:text-properties fo:color="#000000" fo:language="ca" fo:country="ES"/>
    </style:style>
    <style:style style:name="P33" style:parent-style-name="ABSTRACT" style:family="paragraph">
      <style:paragraph-properties fo:line-height="100%" fo:margin-left="0.3347in" fo:margin-right="0.3347in">
        <style:tab-stops/>
      </style:paragraph-properties>
    </style:style>
    <style:style style:name="T34" style:parent-style-name="DefaultParagraphFont" style:family="text">
      <style:text-properties fo:font-weight="bold" style:font-weight-asian="bold" fo:color="#000000" fo:language="ca" fo:country="ES"/>
    </style:style>
    <style:style style:name="T35" style:parent-style-name="DefaultParagraphFont" style:family="text">
      <style:text-properties fo:color="#000000" fo:language="ca" fo:country="ES"/>
    </style:style>
    <style:style style:name="P36" style:parent-style-name="ABSTRACT" style:family="paragraph">
      <style:paragraph-properties fo:line-height="100%" fo:margin-left="0.3347in" fo:margin-right="0.3347in">
        <style:tab-stops/>
      </style:paragraph-properties>
      <style:text-properties fo:color="#000000" fo:language="ca" fo:country="ES"/>
    </style:style>
    <style:style style:name="P37" style:parent-style-name="ABSTRACT" style:family="paragraph">
      <style:paragraph-properties fo:line-height="100%" fo:margin-left="0.3347in" fo:margin-right="0.3347in">
        <style:tab-stops/>
      </style:paragraph-properties>
      <style:text-properties fo:color="#000000" fo:language="ca" fo:country="ES"/>
    </style:style>
    <style:style style:name="P38" style:parent-style-name="PARAGRAPHnoindent" style:family="paragraph">
      <style:paragraph-properties fo:text-align="center" fo:margin-top="0.0833in"/>
    </style:style>
    <style:style style:name="T39" style:parent-style-name="DefaultParagraphFont" style:family="text">
      <style:text-properties fo:color="#000000" fo:language="ca" fo:country="ES"/>
    </style:style>
    <style:style style:name="T40" style:parent-style-name="DefaultParagraphFont" style:family="text">
      <style:text-properties style:font-name="Times New Roman" fo:color="#000000" style:text-position="-10.5% 100%" fo:language="ca" fo:country="ES"/>
    </style:style>
    <style:style style:name="T41" style:parent-style-name="DefaultParagraphFont" style:family="text">
      <style:text-properties style:font-name="Wingdings" style:font-name-asian="Wingdings" style:font-name-complex="Wingdings" fo:color="#000000" style:text-position="-10.5% 100%" fo:language="ca" fo:country="ES"/>
    </style:style>
    <style:style style:name="T42" style:parent-style-name="DefaultParagraphFont" style:family="text">
      <style:text-properties style:font-name="Times New Roman" fo:color="#000000" style:text-position="-10.5% 100%" fo:language="ca" fo:country="ES"/>
    </style:style>
    <style:style style:name="T43" style:parent-style-name="DefaultParagraphFont" style:family="text">
      <style:text-properties fo:color="#000000" fo:language="ca" fo:country="ES"/>
    </style:style>
    <style:style style:name="P44" style:parent-style-name="Heading1" style:family="paragraph">
      <style:paragraph-properties fo:margin-top="0.1388in" fo:line-height="100%"/>
      <style:text-properties fo:color="#000000" fo:language="ca" fo:country="ES"/>
    </style:style>
    <style:style style:name="S1" style:family="section">
      <style:section-properties fo:margin-left="0in" fo:margin-right="0in" style:writing-mode="lr-tb">
        <style:columns fo:column-count="2">
          <style:column style:rel-width="5006*" fo:start-indent="0in" fo:end-indent="0.0833in"/>
          <style:column style:rel-width="5006*" fo:start-indent="0.0833in" fo:end-indent="0in"/>
        </style:columns>
      </style:section-properties>
    </style:style>
    <style:style style:name="P45" style:parent-style-name="Heading1" style:family="paragraph">
      <style:paragraph-properties fo:line-height="100%" fo:margin-left="0in" fo:text-indent="0in">
        <style:tab-stops/>
      </style:paragraph-properties>
    </style:style>
    <style:style style:name="T46" style:parent-style-name="DefaultParagraphFont" style:family="text">
      <style:text-properties fo:color="#000000" fo:language="es" fo:country="ES"/>
    </style:style>
    <style:style style:name="T47" style:parent-style-name="DefaultParagraphFont" style:family="text">
      <style:text-properties fo:color="#000000" fo:language="ca" fo:country="ES"/>
    </style:style>
    <style:style style:name="P48" style:parent-style-name="Textbody" style:family="paragraph">
      <style:paragraph-properties fo:line-height="100%"/>
    </style:style>
    <style:style style:name="T49" style:parent-style-name="DefaultParagraphFont" style:family="text">
      <style:text-properties fo:color="#000000" fo:language="ca" fo:country="ES"/>
    </style:style>
    <style:style style:name="T50" style:parent-style-name="StrongEmphasis" style:family="text">
      <style:text-properties fo:color="#000000" fo:language="ca" fo:country="ES"/>
    </style:style>
    <style:style style:name="T51" style:parent-style-name="DefaultParagraphFont" style:family="text">
      <style:text-properties fo:color="#000000" fo:language="ca" fo:country="ES"/>
    </style:style>
    <style:style style:name="P52" style:parent-style-name="Textbody" style:family="paragraph">
      <style:paragraph-properties fo:line-height="100%"/>
    </style:style>
    <style:style style:name="T53" style:parent-style-name="DefaultParagraphFont" style:family="text">
      <style:text-properties fo:color="#000000" fo:language="ca" fo:country="ES"/>
    </style:style>
    <style:style style:name="T54" style:parent-style-name="StrongEmphasis" style:family="text">
      <style:text-properties fo:color="#000000" fo:language="ca" fo:country="ES"/>
    </style:style>
    <style:style style:name="T55" style:parent-style-name="StrongEmphasis" style:family="text">
      <style:text-properties fo:color="#000000" fo:language="ca" fo:country="ES"/>
    </style:style>
    <style:style style:name="T56" style:parent-style-name="DefaultParagraphFont" style:family="text">
      <style:text-properties fo:color="#000000" fo:language="ca" fo:country="ES"/>
    </style:style>
    <style:style style:name="P57" style:parent-style-name="Textbody" style:family="paragraph">
      <style:paragraph-properties fo:line-height="100%"/>
      <style:text-properties fo:color="#000000" fo:language="ca" fo:country="ES"/>
    </style:style>
    <style:style style:name="P58" style:parent-style-name="Textbody" style:family="paragraph">
      <style:paragraph-properties fo:line-height="100%"/>
    </style:style>
    <style:style style:name="T59" style:parent-style-name="DefaultParagraphFont" style:family="text">
      <style:text-properties fo:color="#000000" fo:language="ca" fo:country="ES"/>
    </style:style>
    <style:style style:name="T60" style:parent-style-name="DefaultParagraphFont" style:family="text">
      <style:text-properties fo:color="#000000" fo:language="ca" fo:country="ES"/>
    </style:style>
    <style:style style:name="T61" style:parent-style-name="DefaultParagraphFont" style:family="text">
      <style:text-properties fo:color="#000000" fo:language="ca" fo:country="ES"/>
    </style:style>
    <style:style style:name="P62" style:parent-style-name="Heading1" style:family="paragraph">
      <style:paragraph-properties fo:line-height="100%" fo:margin-left="0in" fo:text-indent="0in">
        <style:tab-stops/>
      </style:paragraph-properties>
      <style:text-properties fo:color="#000000" fo:language="es" fo:country="ES"/>
    </style:style>
    <style:style style:name="P63" style:parent-style-name="Textbody" style:family="paragraph">
      <style:paragraph-properties fo:line-height="100%"/>
    </style:style>
    <style:style style:name="T64" style:parent-style-name="DefaultParagraphFont" style:family="text">
      <style:text-properties fo:color="#000000" fo:language="es" fo:country="ES"/>
    </style:style>
    <style:style style:name="P65" style:parent-style-name="Heading1" style:family="paragraph">
      <style:paragraph-properties fo:line-height="100%" fo:margin-left="0in" fo:text-indent="0in">
        <style:tab-stops/>
      </style:paragraph-properties>
    </style:style>
    <style:style style:name="T66" style:parent-style-name="DefaultParagraphFont" style:family="text">
      <style:text-properties fo:color="#000000" fo:language="es" fo:country="ES"/>
    </style:style>
    <style:style style:name="T67" style:parent-style-name="DefaultParagraphFont" style:family="text">
      <style:text-properties fo:color="#000000" fo:language="ca" fo:country="ES"/>
    </style:style>
    <style:style style:name="P68" style:parent-style-name="Textbody" style:family="paragraph">
      <style:paragraph-properties fo:line-height="100%"/>
    </style:style>
    <style:style style:name="T69" style:parent-style-name="DefaultParagraphFont" style:family="text">
      <style:text-properties fo:color="#000000" fo:language="ca" fo:country="ES"/>
    </style:style>
    <style:style style:name="T70" style:parent-style-name="StrongEmphasis" style:family="text">
      <style:text-properties fo:color="#000000" fo:language="ca" fo:country="ES"/>
    </style:style>
    <style:style style:name="T71" style:parent-style-name="DefaultParagraphFont" style:family="text">
      <style:text-properties fo:color="#000000" fo:language="ca" fo:country="ES"/>
    </style:style>
    <style:style style:name="P72" style:parent-style-name="Textbody" style:family="paragraph">
      <style:paragraph-properties>
        <style:tab-stops>
          <style:tab-stop style:type="left" style:position="0in"/>
        </style:tab-stops>
      </style:paragraph-properties>
    </style:style>
    <style:style style:name="P73" style:parent-style-name="Textbody" style:family="paragraph">
      <style:paragraph-properties>
        <style:tab-stops>
          <style:tab-stop style:type="left" style:position="0in"/>
        </style:tab-stops>
      </style:paragraph-properties>
    </style:style>
    <style:style style:name="P74" style:parent-style-name="Textbody" style:family="paragraph">
      <style:paragraph-properties>
        <style:tab-stops>
          <style:tab-stop style:type="left" style:position="0in"/>
        </style:tab-stops>
      </style:paragraph-properties>
    </style:style>
    <style:style style:name="P75" style:parent-style-name="Textbody" style:family="paragraph">
      <style:paragraph-properties>
        <style:tab-stops>
          <style:tab-stop style:type="left" style:position="0in"/>
        </style:tab-stops>
      </style:paragraph-properties>
    </style:style>
    <style:style style:name="P76" style:parent-style-name="Textbody" style:family="paragraph">
      <style:paragraph-properties>
        <style:tab-stops>
          <style:tab-stop style:type="left" style:position="0in"/>
        </style:tab-stops>
      </style:paragraph-properties>
    </style:style>
    <style:style style:name="P77" style:parent-style-name="Heading1" style:family="paragraph">
      <style:paragraph-properties fo:line-height="100%" fo:margin-left="0in" fo:text-indent="0in">
        <style:tab-stops/>
      </style:paragraph-properties>
    </style:style>
    <style:style style:name="T78" style:parent-style-name="DefaultParagraphFont" style:family="text">
      <style:text-properties fo:color="#000000" fo:language="es" fo:country="ES"/>
    </style:style>
    <style:style style:name="T79" style:parent-style-name="DefaultParagraphFont" style:family="text">
      <style:text-properties fo:color="#000000" fo:language="ca" fo:country="ES"/>
    </style:style>
    <style:style style:name="T80" style:parent-style-name="DefaultParagraphFont" style:family="text">
      <style:text-properties fo:color="#000000" fo:language="ca" fo:country="ES"/>
    </style:style>
    <style:style style:name="T81" style:parent-style-name="StrongEmphasis" style:family="text">
      <style:text-properties fo:color="#000000" fo:language="ca" fo:country="ES"/>
    </style:style>
    <style:style style:name="T82" style:parent-style-name="DefaultParagraphFont" style:family="text">
      <style:text-properties fo:color="#000000" fo:language="ca" fo:country="ES"/>
    </style:style>
    <style:style style:name="P83" style:parent-style-name="Heading1" style:family="paragraph">
      <style:paragraph-properties fo:line-height="100%" fo:margin-left="0in" fo:text-indent="0in">
        <style:tab-stops/>
      </style:paragraph-properties>
      <style:text-properties fo:color="#000000" fo:language="es" fo:country="ES"/>
    </style:style>
    <style:style style:name="P84" style:parent-style-name="Heading1" style:family="paragraph">
      <style:paragraph-properties fo:line-height="100%" fo:text-indent="0in"/>
    </style:style>
    <style:style style:name="T85" style:parent-style-name="DefaultParagraphFont" style:family="text">
      <style:text-properties fo:color="#000000" fo:language="es" fo:country="ES"/>
    </style:style>
    <style:style style:name="T86" style:parent-style-name="DefaultParagraphFont" style:family="text">
      <style:text-properties fo:color="#000000" fo:language="ca" fo:country="ES"/>
    </style:style>
    <style:style style:name="P87" style:parent-style-name="Textbody" style:family="paragraph">
      <style:paragraph-properties fo:line-height="100%"/>
      <style:text-properties fo:color="#000000" fo:language="ca" fo:country="ES"/>
    </style:style>
    <style:style style:name="P88" style:parent-style-name="Textbody" style:family="paragraph">
      <style:paragraph-properties>
        <style:tab-stops>
          <style:tab-stop style:type="left" style:position="0in"/>
        </style:tab-stops>
      </style:paragraph-properties>
    </style:style>
    <style:style style:name="P89" style:parent-style-name="Textbody" style:family="paragraph">
      <style:paragraph-properties>
        <style:tab-stops>
          <style:tab-stop style:type="left" style:position="0in"/>
        </style:tab-stops>
      </style:paragraph-properties>
    </style:style>
    <style:style style:name="P90" style:parent-style-name="Textbody" style:family="paragraph">
      <style:paragraph-properties>
        <style:tab-stops>
          <style:tab-stop style:type="left" style:position="0in"/>
        </style:tab-stops>
      </style:paragraph-properties>
    </style:style>
    <style:style style:name="P91" style:parent-style-name="Textbody" style:family="paragraph">
      <style:paragraph-properties>
        <style:tab-stops>
          <style:tab-stop style:type="left" style:position="0in"/>
        </style:tab-stops>
      </style:paragraph-properties>
    </style:style>
    <style:style style:name="P92" style:parent-style-name="Textbody" style:family="paragraph">
      <style:paragraph-properties>
        <style:tab-stops>
          <style:tab-stop style:type="left" style:position="0in"/>
        </style:tab-stops>
      </style:paragraph-properties>
    </style:style>
    <style:style style:name="P93" style:parent-style-name="Textbody" style:family="paragraph">
      <style:paragraph-properties>
        <style:tab-stops>
          <style:tab-stop style:type="left" style:position="0in"/>
        </style:tab-stops>
      </style:paragraph-properties>
    </style:style>
    <style:style style:name="P94" style:parent-style-name="Heading1" style:family="paragraph">
      <style:paragraph-properties fo:line-height="100%" fo:text-indent="0in"/>
      <style:text-properties fo:color="#000000" fo:language="ca" fo:country="ES"/>
    </style:style>
    <style:style style:name="P95" style:parent-style-name="Heading2" style:family="paragraph">
      <style:paragraph-properties fo:line-height="100%" fo:margin-left="0in" fo:text-indent="0in">
        <style:tab-stops/>
      </style:paragraph-properties>
      <style:text-properties fo:color="#000000" fo:language="ca" fo:country="ES"/>
    </style:style>
    <style:style style:name="P96" style:parent-style-name="PARAGRAPH" style:family="paragraph">
      <style:paragraph-properties fo:line-height="100%" fo:text-indent="0in"/>
      <style:text-properties fo:color="#000000" fo:language="ca" fo:country="ES"/>
    </style:style>
    <style:style style:name="P97" style:parent-style-name="PARAGRAPH" style:family="paragraph">
      <style:paragraph-properties fo:line-height="100%" fo:text-indent="0in"/>
    </style:style>
    <style:style style:name="T98" style:parent-style-name="DefaultParagraphFont" style:family="text">
      <style:text-properties fo:color="#000000" fo:language="ca" fo:country="ES"/>
    </style:style>
    <style:style style:name="T99" style:parent-style-name="StrongEmphasis" style:family="text">
      <style:text-properties fo:color="#000000" fo:language="ca" fo:country="ES"/>
    </style:style>
    <style:style style:name="T100" style:parent-style-name="DefaultParagraphFont" style:family="text">
      <style:text-properties fo:color="#000000" fo:language="ca" fo:country="ES"/>
    </style:style>
    <style:style style:name="P101" style:parent-style-name="Heading2" style:family="paragraph">
      <style:paragraph-properties fo:line-height="100%" fo:margin-left="0in" fo:text-indent="0in">
        <style:tab-stops/>
      </style:paragraph-properties>
      <style:text-properties fo:color="#000000" fo:language="ca" fo:country="ES"/>
    </style:style>
    <style:style style:name="P102" style:parent-style-name="PARAGRAPH" style:family="paragraph">
      <style:paragraph-properties fo:line-height="100%" fo:text-indent="0in"/>
      <style:text-properties fo:color="#000000" fo:language="ca" fo:country="ES"/>
    </style:style>
    <style:style style:name="P103" style:parent-style-name="PARAGRAPH" style:family="paragraph">
      <style:paragraph-properties fo:line-height="100%" fo:text-indent="0in"/>
    </style:style>
    <style:style style:name="T104" style:parent-style-name="DefaultParagraphFont" style:family="text">
      <style:text-properties fo:color="#000000" fo:language="ca" fo:country="ES"/>
    </style:style>
    <style:style style:name="T105" style:parent-style-name="StrongEmphasis" style:family="text">
      <style:text-properties fo:color="#000000" fo:language="ca" fo:country="ES"/>
    </style:style>
    <style:style style:name="T106" style:parent-style-name="DefaultParagraphFont" style:family="text">
      <style:text-properties fo:color="#000000" fo:language="ca" fo:country="ES"/>
    </style:style>
    <style:style style:name="P107" style:parent-style-name="Heading2" style:family="paragraph">
      <style:paragraph-properties fo:line-height="100%" fo:margin-left="0in" fo:text-indent="0in">
        <style:tab-stops/>
      </style:paragraph-properties>
      <style:text-properties fo:color="#000000" fo:language="ca" fo:country="ES"/>
    </style:style>
    <style:style style:name="P108" style:parent-style-name="PARAGRAPH" style:family="paragraph">
      <style:paragraph-properties fo:line-height="100%" fo:text-indent="0in"/>
    </style:style>
    <style:style style:name="T109" style:parent-style-name="DefaultParagraphFont" style:family="text">
      <style:text-properties fo:color="#000000" fo:language="ca" fo:country="ES"/>
    </style:style>
    <style:style style:name="T110" style:parent-style-name="StrongEmphasis" style:family="text">
      <style:text-properties fo:color="#000000" fo:language="ca" fo:country="ES"/>
    </style:style>
    <style:style style:name="T111" style:parent-style-name="DefaultParagraphFont" style:family="text">
      <style:text-properties fo:color="#000000" fo:language="ca" fo:country="ES"/>
    </style:style>
    <style:style style:name="P112" style:parent-style-name="Heading1" style:family="paragraph">
      <style:paragraph-properties fo:line-height="100%" fo:text-indent="0in"/>
      <style:text-properties fo:color="#000000" fo:language="ca" fo:country="ES"/>
    </style:style>
    <style:style style:name="P113" style:parent-style-name="Heading2" style:family="paragraph">
      <style:paragraph-properties fo:line-height="100%" fo:margin-left="0in" fo:text-indent="0in">
        <style:tab-stops/>
      </style:paragraph-properties>
      <style:text-properties fo:color="#000000" fo:language="ca" fo:country="ES"/>
    </style:style>
    <style:style style:name="P114" style:parent-style-name="PARAGRAPH" style:family="paragraph">
      <style:paragraph-properties fo:line-height="100%" fo:text-indent="0in"/>
    </style:style>
    <style:style style:name="T115" style:parent-style-name="DefaultParagraphFont" style:family="text">
      <style:text-properties fo:color="#000000" fo:language="ca" fo:country="ES"/>
    </style:style>
    <style:style style:name="T116" style:parent-style-name="StrongEmphasis" style:family="text">
      <style:text-properties fo:color="#000000" fo:language="ca" fo:country="ES"/>
    </style:style>
    <style:style style:name="T117" style:parent-style-name="DefaultParagraphFont" style:family="text">
      <style:text-properties fo:color="#000000" fo:language="ca" fo:country="ES"/>
    </style:style>
    <style:style style:name="T118" style:parent-style-name="DefaultParagraphFont" style:family="text">
      <style:text-properties fo:color="#000000" fo:language="ca" fo:country="ES"/>
    </style:style>
    <style:style style:name="T119" style:parent-style-name="DefaultParagraphFont" style:family="text">
      <style:text-properties fo:color="#000000" fo:language="ca" fo:country="ES"/>
    </style:style>
    <style:style style:name="T120" style:parent-style-name="DefaultParagraphFont" style:family="text">
      <style:text-properties fo:color="#000000" fo:language="ca" fo:country="ES"/>
    </style:style>
    <style:style style:name="T121" style:parent-style-name="DefaultParagraphFont" style:family="text">
      <style:text-properties fo:color="#000000" fo:language="ca" fo:country="ES"/>
    </style:style>
    <style:style style:name="T122" style:parent-style-name="DefaultParagraphFont" style:family="text">
      <style:text-properties fo:color="#000000" fo:language="ca" fo:country="ES"/>
    </style:style>
    <style:style style:name="T123" style:parent-style-name="DefaultParagraphFont" style:family="text">
      <style:text-properties fo:color="#000000" fo:language="ca" fo:country="ES"/>
    </style:style>
    <style:style style:name="T124" style:parent-style-name="DefaultParagraphFont" style:family="text">
      <style:text-properties fo:color="#000000" fo:language="ca" fo:country="ES"/>
    </style:style>
    <style:style style:name="T125" style:parent-style-name="DefaultParagraphFont" style:family="text">
      <style:text-properties fo:color="#000000" fo:language="ca" fo:country="ES"/>
    </style:style>
    <style:style style:name="P126" style:parent-style-name="PARAGRAPH" style:family="paragraph">
      <style:paragraph-properties fo:line-height="100%" fo:text-indent="0in"/>
    </style:style>
    <style:style style:name="T127" style:parent-style-name="DefaultParagraphFont" style:family="text">
      <style:text-properties fo:color="#000000" fo:language="ca" fo:country="ES"/>
    </style:style>
    <style:style style:name="T128" style:parent-style-name="StrongEmphasis" style:family="text">
      <style:text-properties fo:color="#000000" fo:language="ca" fo:country="ES"/>
    </style:style>
    <style:style style:name="T129" style:parent-style-name="DefaultParagraphFont" style:family="text">
      <style:text-properties fo:color="#000000" fo:language="ca" fo:country="ES"/>
    </style:style>
    <style:style style:name="T130" style:parent-style-name="StrongEmphasis" style:family="text">
      <style:text-properties fo:color="#000000" fo:language="ca" fo:country="ES"/>
    </style:style>
    <style:style style:name="T131" style:parent-style-name="DefaultParagraphFont" style:family="text">
      <style:text-properties fo:color="#000000" fo:language="ca" fo:country="ES"/>
    </style:style>
    <style:style style:name="T132" style:parent-style-name="StrongEmphasis" style:family="text">
      <style:text-properties fo:color="#000000" fo:language="ca" fo:country="ES"/>
    </style:style>
    <style:style style:name="T133" style:parent-style-name="DefaultParagraphFont" style:family="text">
      <style:text-properties fo:color="#000000" fo:language="ca" fo:country="ES"/>
    </style:style>
    <style:style style:name="P134" style:parent-style-name="Heading2" style:family="paragraph">
      <style:paragraph-properties fo:line-height="100%" fo:margin-left="0in" fo:text-indent="0in">
        <style:tab-stops/>
      </style:paragraph-properties>
      <style:text-properties fo:color="#000000" fo:language="ca" fo:country="ES"/>
    </style:style>
    <style:style style:name="P135" style:parent-style-name="PARAGRAPH" style:family="paragraph">
      <style:paragraph-properties fo:line-height="100%" fo:text-indent="0in"/>
    </style:style>
    <style:style style:name="T136" style:parent-style-name="DefaultParagraphFont" style:family="text">
      <style:text-properties fo:color="#000000" fo:language="ca" fo:country="ES"/>
    </style:style>
    <style:style style:name="T137" style:parent-style-name="StrongEmphasis" style:family="text">
      <style:text-properties fo:color="#000000" fo:language="ca" fo:country="ES"/>
    </style:style>
    <style:style style:name="T138" style:parent-style-name="DefaultParagraphFont" style:family="text">
      <style:text-properties fo:color="#000000" fo:language="ca" fo:country="ES"/>
    </style:style>
    <style:style style:name="T139" style:parent-style-name="StrongEmphasis" style:family="text">
      <style:text-properties fo:color="#000000" fo:language="ca" fo:country="ES"/>
    </style:style>
    <style:style style:name="T140" style:parent-style-name="DefaultParagraphFont" style:family="text">
      <style:text-properties fo:color="#000000" fo:language="ca" fo:country="ES"/>
    </style:style>
    <style:style style:name="T141" style:parent-style-name="StrongEmphasis" style:family="text">
      <style:text-properties fo:color="#000000" fo:language="ca" fo:country="ES"/>
    </style:style>
    <style:style style:name="T142" style:parent-style-name="DefaultParagraphFont" style:family="text">
      <style:text-properties fo:color="#000000" fo:language="ca" fo:country="ES"/>
    </style:style>
    <style:style style:name="P143" style:parent-style-name="PARAGRAPH" style:family="paragraph">
      <style:paragraph-properties fo:line-height="100%" fo:text-indent="0in"/>
    </style:style>
    <style:style style:name="T144" style:parent-style-name="DefaultParagraphFont" style:family="text">
      <style:text-properties fo:color="#000000" fo:language="ca" fo:country="ES"/>
    </style:style>
    <style:style style:name="T145" style:parent-style-name="StrongEmphasis" style:family="text">
      <style:text-properties fo:color="#000000" fo:language="ca" fo:country="ES"/>
    </style:style>
    <style:style style:name="T146" style:parent-style-name="DefaultParagraphFont" style:family="text">
      <style:text-properties fo:color="#000000" fo:language="ca" fo:country="ES"/>
    </style:style>
    <style:style style:name="P147" style:parent-style-name="Heading2" style:family="paragraph">
      <style:paragraph-properties fo:line-height="100%" fo:margin-left="0in" fo:text-indent="0in">
        <style:tab-stops/>
      </style:paragraph-properties>
      <style:text-properties fo:color="#000000" fo:language="ca" fo:country="ES"/>
    </style:style>
    <style:style style:name="P148" style:parent-style-name="PARAGRAPH" style:family="paragraph">
      <style:paragraph-properties fo:line-height="100%" fo:text-indent="0in"/>
    </style:style>
    <style:style style:name="T149" style:parent-style-name="DefaultParagraphFont" style:family="text">
      <style:text-properties fo:color="#000000" fo:language="ca" fo:country="ES"/>
    </style:style>
    <style:style style:name="T150" style:parent-style-name="StrongEmphasis" style:family="text">
      <style:text-properties fo:color="#000000" fo:language="ca" fo:country="ES"/>
    </style:style>
    <style:style style:name="T151" style:parent-style-name="DefaultParagraphFont" style:family="text">
      <style:text-properties fo:color="#000000" fo:language="ca" fo:country="ES"/>
    </style:style>
    <style:style style:name="T152" style:parent-style-name="StrongEmphasis" style:family="text">
      <style:text-properties fo:color="#000000" fo:language="ca" fo:country="ES"/>
    </style:style>
    <style:style style:name="T153" style:parent-style-name="DefaultParagraphFont" style:family="text">
      <style:text-properties fo:color="#000000" fo:language="ca" fo:country="ES"/>
    </style:style>
    <style:style style:name="T154" style:parent-style-name="StrongEmphasis" style:family="text">
      <style:text-properties fo:color="#000000" fo:language="ca" fo:country="ES"/>
    </style:style>
    <style:style style:name="T155" style:parent-style-name="DefaultParagraphFont" style:family="text">
      <style:text-properties fo:color="#000000" fo:language="ca" fo:country="ES"/>
    </style:style>
    <style:style style:name="T156" style:parent-style-name="StrongEmphasis" style:family="text">
      <style:text-properties fo:color="#000000" fo:language="ca" fo:country="ES"/>
    </style:style>
    <style:style style:name="T157" style:parent-style-name="DefaultParagraphFont" style:family="text">
      <style:text-properties fo:color="#000000" fo:language="ca" fo:country="ES"/>
    </style:style>
    <style:style style:name="T158" style:parent-style-name="StrongEmphasis" style:family="text">
      <style:text-properties fo:color="#000000" fo:language="ca" fo:country="ES"/>
    </style:style>
    <style:style style:name="T159" style:parent-style-name="DefaultParagraphFont" style:family="text">
      <style:text-properties fo:color="#000000" fo:language="ca" fo:country="ES"/>
    </style:style>
    <style:style style:name="T160" style:parent-style-name="StrongEmphasis" style:family="text">
      <style:text-properties fo:color="#000000" fo:language="ca" fo:country="ES"/>
    </style:style>
    <style:style style:name="T161" style:parent-style-name="DefaultParagraphFont" style:family="text">
      <style:text-properties fo:color="#000000" fo:language="ca" fo:country="ES"/>
    </style:style>
    <style:style style:name="T162" style:parent-style-name="StrongEmphasis" style:family="text">
      <style:text-properties fo:color="#000000" fo:language="ca" fo:country="ES"/>
    </style:style>
    <style:style style:name="T163" style:parent-style-name="DefaultParagraphFont" style:family="text">
      <style:text-properties fo:color="#000000" fo:language="ca" fo:country="ES"/>
    </style:style>
    <style:style style:name="T164" style:parent-style-name="StrongEmphasis" style:family="text">
      <style:text-properties fo:color="#000000" fo:language="ca" fo:country="ES"/>
    </style:style>
    <style:style style:name="T165" style:parent-style-name="DefaultParagraphFont" style:family="text">
      <style:text-properties fo:color="#000000" fo:language="ca" fo:country="ES"/>
    </style:style>
    <style:style style:name="T166" style:parent-style-name="StrongEmphasis" style:family="text">
      <style:text-properties fo:color="#000000" fo:language="ca" fo:country="ES"/>
    </style:style>
    <style:style style:name="T167" style:parent-style-name="DefaultParagraphFont" style:family="text">
      <style:text-properties fo:color="#000000" fo:language="ca" fo:country="ES"/>
    </style:style>
    <style:style style:name="T168" style:parent-style-name="StrongEmphasis" style:family="text">
      <style:text-properties fo:color="#000000" fo:language="ca" fo:country="ES"/>
    </style:style>
    <style:style style:name="T169" style:parent-style-name="DefaultParagraphFont" style:family="text">
      <style:text-properties fo:color="#000000" fo:language="ca" fo:country="ES"/>
    </style:style>
    <style:style style:name="P170" style:parent-style-name="PARAGRAPH" style:family="paragraph">
      <style:paragraph-properties fo:line-height="100%" fo:text-indent="0in"/>
      <style:text-properties fo:color="#000000" fo:language="ca" fo:country="ES"/>
    </style:style>
    <style:style style:name="P171" style:parent-style-name="Heading2" style:family="paragraph">
      <style:paragraph-properties fo:line-height="100%" fo:margin-left="0in" fo:text-indent="0in">
        <style:tab-stops/>
      </style:paragraph-properties>
      <style:text-properties fo:color="#000000" fo:language="ca" fo:country="ES"/>
    </style:style>
    <style:style style:name="P172" style:parent-style-name="PARAGRAPH" style:family="paragraph">
      <style:paragraph-properties fo:line-height="100%" fo:text-indent="0in"/>
    </style:style>
    <style:style style:name="T173" style:parent-style-name="DefaultParagraphFont" style:family="text">
      <style:text-properties fo:color="#000000" fo:language="ca" fo:country="ES"/>
    </style:style>
    <style:style style:name="T174" style:parent-style-name="StrongEmphasis" style:family="text">
      <style:text-properties fo:color="#000000" fo:language="ca" fo:country="ES"/>
    </style:style>
    <style:style style:name="T175" style:parent-style-name="DefaultParagraphFont" style:family="text">
      <style:text-properties fo:color="#000000" fo:language="ca" fo:country="ES"/>
    </style:style>
    <style:style style:name="T176" style:parent-style-name="StrongEmphasis" style:family="text">
      <style:text-properties fo:color="#000000" fo:language="ca" fo:country="ES"/>
    </style:style>
    <style:style style:name="T177" style:parent-style-name="DefaultParagraphFont" style:family="text">
      <style:text-properties fo:color="#000000" fo:language="ca" fo:country="ES"/>
    </style:style>
    <style:style style:name="T178" style:parent-style-name="StrongEmphasis" style:family="text">
      <style:text-properties fo:color="#000000" fo:language="ca" fo:country="ES"/>
    </style:style>
    <style:style style:name="T179" style:parent-style-name="DefaultParagraphFont" style:family="text">
      <style:text-properties fo:color="#000000" fo:language="ca" fo:country="ES"/>
    </style:style>
    <style:style style:name="T180" style:parent-style-name="StrongEmphasis" style:family="text">
      <style:text-properties fo:color="#000000" fo:language="ca" fo:country="ES"/>
    </style:style>
    <style:style style:name="T181" style:parent-style-name="DefaultParagraphFont" style:family="text">
      <style:text-properties fo:color="#000000" fo:language="ca" fo:country="ES"/>
    </style:style>
    <style:style style:name="P182" style:parent-style-name="Heading1" style:family="paragraph">
      <style:paragraph-properties fo:line-height="100%" fo:text-indent="0in"/>
      <style:text-properties fo:color="#000000" fo:language="ca" fo:country="ES"/>
    </style:style>
    <style:style style:name="P183" style:parent-style-name="Heading2" style:family="paragraph">
      <style:paragraph-properties fo:line-height="100%" fo:margin-left="0in" fo:text-indent="0in">
        <style:tab-stops/>
      </style:paragraph-properties>
      <style:text-properties fo:color="#000000" fo:language="ca" fo:country="ES"/>
    </style:style>
    <style:style style:name="P184" style:parent-style-name="PARAGRAPH" style:family="paragraph">
      <style:paragraph-properties fo:line-height="100%" fo:text-indent="0in"/>
      <style:text-properties fo:color="#000000" fo:language="ca" fo:country="ES"/>
    </style:style>
    <style:style style:name="P185" style:parent-style-name="PARAGRAPH" style:family="paragraph">
      <style:paragraph-properties fo:line-height="100%" fo:text-indent="0in"/>
      <style:text-properties fo:color="#000000" fo:language="ca" fo:country="ES"/>
    </style:style>
    <style:style style:name="P186" style:parent-style-name="Heading2" style:family="paragraph">
      <style:paragraph-properties fo:line-height="100%" fo:margin-left="0in" fo:text-indent="0in">
        <style:tab-stops/>
      </style:paragraph-properties>
      <style:text-properties fo:color="#000000" fo:language="ca" fo:country="ES"/>
    </style:style>
    <style:style style:name="P187" style:parent-style-name="PARAGRAPH" style:family="paragraph">
      <style:paragraph-properties fo:line-height="100%" fo:text-indent="0in"/>
      <style:text-properties fo:color="#000000" fo:language="ca" fo:country="ES"/>
    </style:style>
    <style:style style:name="P188" style:parent-style-name="PARAGRAPH" style:family="paragraph">
      <style:paragraph-properties fo:line-height="100%" fo:text-indent="0in"/>
      <style:text-properties fo:color="#000000" fo:language="ca" fo:country="ES"/>
    </style:style>
    <style:style style:name="P189" style:parent-style-name="Heading2" style:family="paragraph">
      <style:paragraph-properties fo:line-height="100%" fo:margin-left="0in" fo:text-indent="0in">
        <style:tab-stops/>
      </style:paragraph-properties>
      <style:text-properties fo:color="#000000" fo:language="ca" fo:country="ES"/>
    </style:style>
    <style:style style:name="P190" style:parent-style-name="PARAGRAPH" style:family="paragraph">
      <style:paragraph-properties fo:line-height="100%" fo:text-indent="0in"/>
      <style:text-properties fo:color="#000000" fo:language="ca" fo:country="ES"/>
    </style:style>
    <style:style style:name="P191" style:parent-style-name="PARAGRAPH" style:family="paragraph">
      <style:paragraph-properties fo:line-height="100%" fo:text-indent="0in"/>
    </style:style>
    <style:style style:name="T192" style:parent-style-name="DefaultParagraphFont" style:family="text">
      <style:text-properties fo:color="#000000" fo:language="ca" fo:country="ES"/>
    </style:style>
    <style:style style:name="T193" style:parent-style-name="StrongEmphasis" style:family="text">
      <style:text-properties fo:color="#000000" fo:language="ca" fo:country="ES"/>
    </style:style>
    <style:style style:name="T194" style:parent-style-name="DefaultParagraphFont" style:family="text">
      <style:text-properties fo:color="#000000" fo:language="ca" fo:country="ES"/>
    </style:style>
    <style:style style:name="P195" style:parent-style-name="Heading1" style:family="paragraph">
      <style:paragraph-properties fo:line-height="100%"/>
      <style:text-properties fo:color="#000000" fo:language="ca" fo:country="ES"/>
    </style:style>
    <style:style style:name="P196" style:parent-style-name="Text" style:family="paragraph">
      <style:paragraph-properties fo:line-height="100%" fo:text-indent="0in"/>
    </style:style>
    <style:style style:name="T197" style:parent-style-name="DefaultParagraphFont" style:family="text">
      <style:text-properties fo:color="#000000" fo:language="ca" fo:country="ES"/>
    </style:style>
    <style:style style:name="P198" style:parent-style-name="Text" style:family="paragraph">
      <style:paragraph-properties fo:line-height="100%" fo:text-indent="0in"/>
    </style:style>
    <style:style style:name="T199" style:parent-style-name="DefaultParagraphFont" style:family="text">
      <style:text-properties fo:color="#000000" fo:language="ca" fo:country="ES"/>
    </style:style>
    <style:style style:name="T200" style:parent-style-name="DefaultParagraphFont" style:family="text">
      <style:text-properties fo:color="#000000" fo:language="ca" fo:country="ES"/>
    </style:style>
    <style:style style:name="P201" style:parent-style-name="Text" style:family="paragraph">
      <style:paragraph-properties fo:line-height="100%" fo:text-indent="0in"/>
    </style:style>
    <style:style style:name="T202" style:parent-style-name="DefaultParagraphFont" style:family="text">
      <style:text-properties fo:color="#000000" fo:language="ca" fo:country="ES"/>
    </style:style>
    <style:style style:name="P203" style:parent-style-name="ReferenceHead" style:family="paragraph">
      <style:paragraph-properties fo:text-align="start"/>
      <style:text-properties style:font-name="Helvetica" fo:font-weight="bold" style:font-weight-asian="bold" style:font-weight-complex="bold" fo:color="#000000" fo:font-size="11pt" style:font-size-asian="11pt" fo:language="ca" fo:country="ES"/>
    </style:style>
    <style:style style:name="P204" style:parent-style-name="PARAGRAPHnoindent" style:family="paragraph">
      <style:paragraph-properties fo:line-height="100%"/>
      <style:text-properties fo:color="#000000" fo:language="ca" fo:country="ES"/>
    </style:style>
    <style:style style:name="P205" style:parent-style-name="ReferenceHead" style:family="paragraph">
      <style:paragraph-properties fo:text-align="start"/>
      <style:text-properties style:font-name="Helvetica" fo:font-weight="bold" style:font-weight-asian="bold" style:font-weight-complex="bold" fo:color="#000000" fo:font-size="11pt" style:font-size-asian="11pt" fo:language="ca" fo:country="ES"/>
    </style:style>
    <style:style style:name="P206" style:parent-style-name="Textbody" style:family="paragraph">
      <style:paragraph-properties fo:line-height="100%"/>
    </style:style>
    <style:style style:name="T207" style:parent-style-name="DefaultParagraphFont" style:family="text">
      <style:text-properties fo:color="#000000" fo:font-size="8pt" style:font-size-asian="8pt" style:font-size-complex="8pt" fo:language="ca" fo:country="ES"/>
    </style:style>
    <style:style style:name="T208" style:parent-style-name="Emphasis" style:family="text">
      <style:text-properties fo:language="ca" fo:country="ES"/>
    </style:style>
    <style:style style:name="T209" style:parent-style-name="DefaultParagraphFont" style:family="text">
      <style:text-properties fo:color="#000000" fo:font-size="8pt" style:font-size-asian="8pt" style:font-size-complex="8pt" fo:language="ca" fo:country="ES"/>
    </style:style>
    <style:style style:name="P210" style:parent-style-name="Textbody" style:family="paragraph">
      <style:paragraph-properties fo:line-height="100%"/>
    </style:style>
    <style:style style:name="T211" style:parent-style-name="DefaultParagraphFont" style:family="text">
      <style:text-properties fo:color="#000000" fo:font-size="8pt" style:font-size-asian="8pt" style:font-size-complex="8pt" fo:language="ca" fo:country="ES"/>
    </style:style>
    <style:style style:name="T212" style:parent-style-name="Emphasis" style:family="text">
      <style:text-properties fo:language="ca" fo:country="ES"/>
    </style:style>
    <style:style style:name="T213" style:parent-style-name="DefaultParagraphFont" style:family="text">
      <style:text-properties fo:color="#000000" fo:font-size="8pt" style:font-size-asian="8pt" style:font-size-complex="8pt" fo:language="ca" fo:country="ES"/>
    </style:style>
    <style:style style:name="P214" style:parent-style-name="Textbody" style:family="paragraph">
      <style:paragraph-properties fo:line-height="100%"/>
    </style:style>
    <style:style style:name="T215" style:parent-style-name="DefaultParagraphFont" style:family="text">
      <style:text-properties fo:color="#000000" fo:font-size="8pt" style:font-size-asian="8pt" style:font-size-complex="8pt" fo:language="ca" fo:country="ES"/>
    </style:style>
    <style:style style:name="T216" style:parent-style-name="Emphasis" style:family="text">
      <style:text-properties fo:language="ca" fo:country="ES"/>
    </style:style>
    <style:style style:name="T217" style:parent-style-name="DefaultParagraphFont" style:family="text">
      <style:text-properties fo:color="#000000" fo:font-size="8pt" style:font-size-asian="8pt" style:font-size-complex="8pt" fo:language="ca" fo:country="ES"/>
    </style:style>
    <style:style style:name="P218" style:parent-style-name="Textbody" style:family="paragraph">
      <style:paragraph-properties fo:line-height="100%"/>
    </style:style>
    <style:style style:name="T219" style:parent-style-name="DefaultParagraphFont" style:family="text">
      <style:text-properties fo:color="#000000" fo:font-size="8pt" style:font-size-asian="8pt" style:font-size-complex="8pt" fo:language="ca" fo:country="ES"/>
    </style:style>
    <style:style style:name="T220" style:parent-style-name="Emphasis" style:family="text">
      <style:text-properties fo:language="ca" fo:country="ES"/>
    </style:style>
    <style:style style:name="T221" style:parent-style-name="DefaultParagraphFont" style:family="text">
      <style:text-properties fo:color="#000000" fo:font-size="8pt" style:font-size-asian="8pt" style:font-size-complex="8pt" fo:language="ca" fo:country="ES"/>
    </style:style>
    <style:style style:name="P222" style:parent-style-name="Textbody" style:family="paragraph">
      <style:paragraph-properties fo:line-height="100%"/>
    </style:style>
    <style:style style:name="T223" style:parent-style-name="DefaultParagraphFont" style:family="text">
      <style:text-properties fo:color="#000000" fo:font-size="8pt" style:font-size-asian="8pt" style:font-size-complex="8pt" fo:language="ca" fo:country="ES"/>
    </style:style>
    <style:style style:name="T224" style:parent-style-name="Emphasis" style:family="text">
      <style:text-properties fo:font-size="8pt" style:font-size-asian="8pt" style:font-size-complex="8pt" fo:language="ca" fo:country="ES"/>
    </style:style>
    <style:style style:name="T225" style:parent-style-name="DefaultParagraphFont" style:family="text">
      <style:text-properties fo:color="#000000" fo:font-size="8pt" style:font-size-asian="8pt" style:font-size-complex="8pt" fo:language="ca" fo:country="ES"/>
    </style:style>
    <style:style style:name="P226" style:parent-style-name="Textbody" style:family="paragraph">
      <style:paragraph-properties fo:line-height="100%"/>
    </style:style>
    <style:style style:name="T227" style:parent-style-name="DefaultParagraphFont" style:family="text">
      <style:text-properties fo:color="#000000" fo:font-size="8pt" style:font-size-asian="8pt" style:font-size-complex="8pt" fo:language="ca" fo:country="ES"/>
    </style:style>
    <style:style style:name="T228" style:parent-style-name="Emphasis" style:family="text">
      <style:text-properties fo:font-size="8pt" style:font-size-asian="8pt" style:font-size-complex="8pt" fo:language="ca" fo:country="ES"/>
    </style:style>
    <style:style style:name="T229" style:parent-style-name="DefaultParagraphFont" style:family="text">
      <style:text-properties fo:color="#000000" fo:font-size="8pt" style:font-size-asian="8pt" style:font-size-complex="8pt" fo:language="ca" fo:country="ES"/>
    </style:style>
    <style:style style:name="P230" style:parent-style-name="Textbody" style:family="paragraph">
      <style:paragraph-properties fo:line-height="100%"/>
    </style:style>
    <style:style style:name="T231" style:parent-style-name="DefaultParagraphFont" style:family="text">
      <style:text-properties fo:color="#000000" fo:font-size="8pt" style:font-size-asian="8pt" style:font-size-complex="8pt" fo:language="ca" fo:country="ES"/>
    </style:style>
    <style:style style:name="T232" style:parent-style-name="Emphasis" style:family="text">
      <style:text-properties fo:font-size="8pt" style:font-size-asian="8pt" style:font-size-complex="8pt" fo:language="ca" fo:country="ES"/>
    </style:style>
    <style:style style:name="T233" style:parent-style-name="DefaultParagraphFont" style:family="text">
      <style:text-properties fo:color="#000000" fo:font-size="8pt" style:font-size-asian="8pt" style:font-size-complex="8pt" fo:language="ca" fo:country="ES"/>
    </style:style>
    <style:style style:name="P234" style:parent-style-name="References" style:family="paragraph">
      <style:text-properties style:font-name="Palatino" fo:color="#000000" fo:letter-spacing="-0.0041in" fo:language="ca" fo:country="ES"/>
    </style:style>
    <style:style style:name="P235" style:parent-style-name="References" style:master-page-name="MP2" style:family="paragraph">
      <style:paragraph-properties fo:break-before="page"/>
      <style:text-properties style:font-name="Helvetica" fo:font-weight="bold" style:font-weight-asian="bold" style:font-weight-complex="bold" fo:color="#000000" fo:font-size="11pt" style:font-size-asian="11pt" fo:language="ca" fo:country="ES"/>
    </style:style>
    <style:style style:name="P247" style:parent-style-name="ReferenceHead" style:family="paragraph">
      <style:paragraph-properties fo:text-align="start"/>
      <style:text-properties style:font-name="Helvetica" fo:font-weight="bold" style:font-weight-asian="bold" style:font-weight-complex="bold" fo:color="#000000" fo:font-size="11pt" style:font-size-asian="11pt" fo:language="ca" fo:country="ES"/>
    </style:style>
    <style:style style:name="P248" style:parent-style-name="PARAGRAPHnoindent" style:family="paragraph">
      <style:paragraph-properties fo:line-height="100%"/>
      <style:text-properties fo:color="#000000" fo:language="ca" fo:country="ES"/>
    </style:style>
    <style:style style:name="P249" style:parent-style-name="ReferenceHead" style:family="paragraph">
      <style:paragraph-properties fo:text-align="start"/>
      <style:text-properties style:font-name="Helvetica" fo:font-weight="bold" style:font-weight-asian="bold" style:font-weight-complex="bold" fo:color="#000000" fo:font-size="11pt" style:font-size-asian="11pt" fo:language="ca" fo:country="ES"/>
    </style:style>
    <style:style style:name="P250" style:parent-style-name="PARAGRAPHnoindent" style:family="paragraph">
      <style:paragraph-properties fo:line-height="100%"/>
      <style:text-properties fo:color="#000000" fo:language="ca" fo:country="ES"/>
    </style:style>
    <style:style style:name="P251" style:parent-style-name="References" style:family="paragraph">
      <style:text-properties style:font-name="Palatino Linotype" fo:color="#000000" fo:letter-spacing="-0.0041in" fo:language="ca" fo:country="ES"/>
    </style:style>
    <style:style style:name="P252" style:parent-style-name="References" style:family="paragraph">
      <style:text-properties style:font-name="Palatino Linotype" fo:color="#000000" fo:letter-spacing="-0.0041in" fo:language="ca" fo:country="ES"/>
    </style:style>
    <style:style style:name="P253" style:parent-style-name="References" style:family="paragraph">
      <style:text-properties style:font-name="Palatino Linotype" fo:color="#000000" fo:letter-spacing="-0.0041in" fo:language="ca" fo:country="ES"/>
    </style:style>
    <style:style style:name="P254" style:parent-style-name="References" style:family="paragraph">
      <style:text-properties style:font-name="Palatino Linotype" fo:color="#000000" fo:letter-spacing="-0.0041in" fo:language="ca" fo:country="ES"/>
    </style:style>
    <style:style style:name="P255" style:parent-style-name="References" style:family="paragraph">
      <style:text-properties style:font-name="Palatino Linotype" fo:color="#000000" fo:letter-spacing="-0.0041in" fo:language="ca" fo:country="ES"/>
    </style:style>
    <style:style style:name="P256" style:parent-style-name="References" style:family="paragraph">
      <style:text-properties style:font-name="Palatino Linotype" fo:color="#000000" fo:letter-spacing="-0.0041in" fo:language="ca" fo:country="ES"/>
    </style:style>
    <style:style style:name="P257" style:parent-style-name="References" style:family="paragraph">
      <style:text-properties style:font-name="Palatino Linotype" fo:color="#000000" fo:letter-spacing="-0.0041in" fo:language="ca" fo:country="ES"/>
    </style:style>
    <style:style style:name="P258" style:parent-style-name="References" style:family="paragraph">
      <style:text-properties style:font-name="Palatino Linotype" fo:color="#000000" fo:letter-spacing="-0.0041in" fo:language="ca" fo:country="ES"/>
    </style:style>
    <style:style style:name="P259" style:parent-style-name="References" style:family="paragraph">
      <style:text-properties style:font-name="Palatino Linotype" fo:color="#000000" fo:letter-spacing="-0.0041in" fo:language="ca" fo:country="ES"/>
    </style:style>
    <style:style style:name="P260" style:parent-style-name="References" style:family="paragraph">
      <style:text-properties style:font-name="Palatino Linotype" fo:color="#000000" fo:letter-spacing="-0.0041in" fo:language="ca" fo:country="ES"/>
    </style:style>
    <style:style style:name="P261" style:parent-style-name="References" style:family="paragraph">
      <style:text-properties style:font-name="Palatino Linotype" fo:color="#000000" fo:letter-spacing="-0.0041in" fo:language="ca" fo:country="ES"/>
    </style:style>
    <style:style style:name="P262" style:parent-style-name="References" style:family="paragraph">
      <style:text-properties style:font-name="Palatino Linotype" fo:color="#000000" fo:letter-spacing="-0.0041in" fo:language="ca" fo:country="ES"/>
    </style:style>
    <style:style style:name="P263" style:parent-style-name="References" style:family="paragraph">
      <style:text-properties style:font-name="Palatino Linotype" fo:color="#000000" fo:letter-spacing="-0.0041in" fo:language="ca" fo:country="ES"/>
    </style:style>
    <style:style style:name="P264" style:parent-style-name="References" style:family="paragraph">
      <style:text-properties style:font-name="Palatino Linotype" fo:color="#000000" fo:letter-spacing="-0.0041in" fo:language="ca" fo:country="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Construcció d’una ETL per a la consolidació de prospecció comercial</text:p>
      <text:p text:style-name="P18">Dante Rodríguez Milán</text:p>
      <text:p text:style-name="P19"><text:span text:style-name="T20">Resum</text:span><text:span text:style-name="T21">—Resum del projecte, màxim 10 línies.</text:span></text:p>
      <text:p text:style-name="P22">En l'àmbit empresarial actual, la captació i retenció de clients és un factor crític per a la competitivitat de les organitzacions. Per ser eficients, les empreses necessiten prendre decisions informades i anticipar tendències del mercat. No obstant això, moltes organitzacions no ho fan de manera adequada, principalment a causa de la dispersió de les dades en sitges aïllades i la manca d'eines integrades. En aquest context, els equips de màrqueting i vendes necessiten solucions que els permetin gestionar i explotar les dades comercials de forma eficient. La proposta d'aquest Treball de Fi de Grau és proporcionar un sistema ETL (Extract, Transform, Load) que consolidi dades de prospecció comercial procedents de diferents fonts, garantint-ne la qualitat mitjançant processos de neteja i normalització, i carregant-les en un repositori centralitzat. El resultat és una infraestructura escalable que ofereix una visió unificada dels clients potencials i dóna suport a la presa de decisions comercials estratègiques.</text:p>
      <text:p text:style-name="P23"/>
      <text:p text:style-name="P24"><text:span text:style-name="T25">Paraules clau</text:span><text:span text:style-name="T26">—Paraules clau del projecte, màxim 2 línies.</text:span></text:p>
      <text:p text:style-name="P27">ETL (Extract, Transform, Load), integració de dades, prospecció comercial, qualitat de dades, consolidació d’informació, automatització de processos, anàlisi de dades, suport a la presa de decisions.</text:p>
      <text:p text:style-name="P28"/>
      <text:p text:style-name="P29"><text:span text:style-name="T30">Abstract</text:span><text:span text:style-name="T31">—Versió en anglès del resum.</text:span></text:p>
      <text:p text:style-name="P32">In today's business environment, customer acquisition and retention are critical factors for organizational competitiveness. To be efficient, companies need to make informed decisions and anticipate market trends. However, many organizations fail to do so adequately, mainly due to data dispersion across isolated silos and the lack of integrated tools. In this context, marketing and sales teams need solutions that allow them to manage and exploit commercial data efficiently. The proposal of this Final Degree Project is to provide an ETL (Extract, Transform, Load) system that consolidates commercial prospecting data from different sources, ensuring data quality through cleansing and normalization processes, and loading it into a centralized repository. The result is a scalable infrastructure that offers a unified view of potential clients and supports strategic commercial decision-making.</text:p>
      <text:p text:style-name="P33"><text:span text:style-name="T34">Index Terms</text:span><text:span text:style-name="T35">—Versió en anglès de les paraules clau.</text:span></text:p>
      <text:p text:style-name="P36">ETL (Extract, Transform, Load), data integration, commercial prospecting, data quality, information consolidation, process automation, data analytics, decision-making support.</text:p>
      <text:p text:style-name="P37"/>
      <text:p text:style-name="P38"><text:span text:style-name="T39">——————————</text:span><text:span text:style-name="T40"><text:s text:c="3"/></text:span><text:span text:style-name="T41"></text:span><text:span text:style-name="T42"><text:s text:c="3"/></text:span><text:span text:style-name="T43">——————————</text:span></text:p>
      <text:h text:style-name="P44" text:outline-level="1">1<text:tab/>Introducció - Context del treball</text:h>
      <text:section text:name="Sect1" text:style-name="S1">
        <text:h text:style-name="P45" text:outline-level="1"><text:span text:style-name="T46">1.1<text:s/></text:span><text:span text:style-name="T47">Informació preliminar sobre la qüestió a tractar</text:span></text:h>
        <text:p text:style-name="P48"><text:span text:style-name="T49">Actualment, les empreses gestionen grans volums de dades provinents de múltiples fonts, especialment en l’àmbit comercial. Aquestes dades són essencials per a les activitats de<text:s/></text:span><text:span text:style-name="T50">prospecció comercial</text:span><text:span text:style-name="T51">, ja que permeten identificar potencials clients i noves oportunitats de negoci. No obstant això, sovint aquesta informació es troba dispersa en diferents sistemes i formats, cosa que dificulta la seva integració i anàlisi.</text:span></text:p>
        <text:p text:style-name="P52"><text:span text:style-name="T53">Davant aquesta situació, les empreses tenen la necessitat d’</text:span><text:span text:style-name="T54">automatitzar els processos de recopilació i integració<text:s/></text:span><text:span text:style-name="T55">de dades</text:span><text:span text:style-name="T56">, amb l’objectiu de millorar l’eficiència operativa i facilitar la presa de decisions basada en informació fiable.</text:span></text:p>
        <text:p text:style-name="P57">Actualment, però, la realitat de moltes organitzacions dista molt d'aquest escenari ideal. Les dades comercials es troben emmagatzemades en sitges aïllades, on cada departament o sistema gestiona la seva pròpia informació sense cap tipus d'integració amb la resta. A més, és habitual trobar problemes de qualitat de les dades: registres duplicats, formats inconsistents, valors absents o incorrectes que fan infiable qualsevol anàlisi. A aquesta problemàtica s'hi suma la manca de data governance, és a dir, l'absència de polítiques i estàndards clars que regulin com s'han de gestionar, emmagatzemar i compartir les dades dins de l'organització. Com a conseqüència, els<text:s/><text:soft-page-break/>equips comercials i de màrqueting es veuen obligats a realitzar tasques manuals de recopilació i neteja de dades, cosa que suposa una pèrdua de temps i un risc elevat d'errors. Tot plegat genera una situació en què les empreses no poden aprofitar el valor real de la informació que ja tenen disponible.</text:p>
        <text:p text:style-name="P58"><text:span text:style-name="T59">En el context concret d’aquest projecte, el procés de prospecció comercial involucra tres plataformes heterogènies—Outreach, ZoomInfo i LeadGenius—cada una amb el seu propi format d’exportació, la seva convenció de columnes i el seu nivell de qualitat de dades. Sense una capa d’integració, cada execució requereix hores de transformació manual en fulls de càlcul, amb el risc associat d’introduir errors de cop</text:span><text:span text:style-name="T60">ypaste</text:span><text:span text:style-name="T61">, pèrdua de registres i inconsistència entre lliuraments. Automatitzar aquest procés mitjançant una ETL és, per tant, una necessitat operativa directa i no només una millora tècnica.</text:span></text:p>
        <text:h text:style-name="P62" text:outline-level="1">1.2 <text:s/>Finalitat</text:h>
        <text:p text:style-name="P63"><text:span text:style-name="T64">La finalitat d’aquest projecte és desenvolupar una solució per facilitar la identificació de clients potencials, millorar la captació i retenció de clients i permetre optimitzar els processos comercials mitjançant una millor gestió de la informació.</text:span></text:p>
        <text:h text:style-name="P65" text:outline-level="1"><text:span text:style-name="T66">2 <text:s/>O</text:span><text:span text:style-name="T67">bjectiu</text:span></text:h>
        <text:p text:style-name="P68"><text:span text:style-name="T69">L’objectiu principal d’aquest treball és<text:s/></text:span><text:span text:style-name="T70">dissenyar i implementar un procés ETL que permeti integrar i consolidar dades de prospecció comercial provinents de diverses fonts d’informació</text:span><text:span text:style-name="T71">.</text:span></text:p>
        <text:p text:style-name="Textbody">Els objectius específics són:</text:p>
        <text:list text:style-name="WWNum3">
          <text:list-item text:start-value="0">
            <text:p text:style-name="P72">Analitzar les fonts de dades disponibles.</text:p>
          </text:list-item>
          <text:list-item>
            <text:p text:style-name="P73">Dissenyar una arquitectura ETL adequada.</text:p>
          </text:list-item>
          <text:list-item>
            <text:p text:style-name="P74">Implementar els processos d’extracció, transformació i càrrega de dades.</text:p>
          </text:list-item>
          <text:list-item>
            <text:p text:style-name="P75">Consolidar la informació en un repositori centralitzat.</text:p>
          </text:list-item>
          <text:list-item>
            <text:p text:style-name="P76">Validar la qualitat de les dades obtingudes.</text:p>
          </text:list-item>
        </text:list>
        <text:h text:style-name="P77" text:outline-level="1"><text:span text:style-name="T78">3 <text:s/></text:span><text:span text:style-name="T79">Metodologia</text:span></text:h>
        <text:p text:style-name="Textbody">El desenvolupament d'aquest projecte s'abordarà mitjançant una metodologia iterativa i incremental, inspirada en els principis àgils, que permetrà anar construint i validant el sistema ETL de forma progressiva. A diferència d'un enfocament en cascada, aquest model permet detectar i corregir problemes en etapes<text:s/>primerenques, adaptant-se als canvis que puguin sorgir durant el desenvolupament.</text:p>
        <text:p text:style-name="Textbody">Per a la gestió i planificació del projecte s'utilitzarà un diagrama de Gantt que permetrà visualitzar la distribució temporal de les tasques, identificar dependències entre elles i controlar que el desenvolupament s'ajusta als terminis establerts. El progrés es revisarà periòdicament mitjançant sessions d'autoavaluació per assegurar que s'avança segons la planificació prevista.</text:p>
        <text:p text:style-name="Textbody">Pel que fa al desenvolupament tècnic, s'adoptarà un enfocament basat en prototips. En primer lloc, es construirà un prototip mínim funcional que cobreixi el flux complet del pipeline ETL amb una font de dades simple. A partir d'aquí, s'aniran incorporant de forma incremental noves fonts de dades, transformacions més complexes i mecanismes de control de qualitat. Cada increment serà provat i validat abans de continuar amb el següent.</text:p>
        <text:p text:style-name="Textbody">Per garantir la qualitat del codi i la traçabilitat dels canvis, s'utilitzarà un sistema de control de versions amb Git. A més, es definiran tests automatitzats per verificar el comportament dels components crítics del pipeline, especialment els processos de transformació i neteja de dades.</text:p>
        <text:p text:style-name="Textbody">Finalment, la documentació es redactarà de manera paral·lela al desenvolupament, registrant les decisions de disseny, els problemes trobats i les solucions adoptades a mesura que avanci el projecte, en lloc de deixar-la per al final.</text:p>
        <text:p text:style-name="Textbody"><text:span text:style-name="T80">En la pràctica, el projecte ha evolucionat en tres increments principals, documentats al repositori Git. El primer increment va produir els cinc scripts monolítics operatius, cadascun autosuficient però amb lògica duplicada. El segon increment va extreure les funcions auxiliars compartides a utils.py, eliminant la duplicació i establint una base comú de validació. El tercer increment va introduir el patió<text:s/></text:span><text:span text:style-name="T81">config-driven</text:span><text:span text:style-name="T82">: el motor run_prospect_pipeline centralitza el flux i cada script queda reduït a un diccionari de configuració més les entrades interactives de l’usuari, facilitant el manteniment i l’extensibilitat futura del sistema.</text:span></text:p>
        <text:soft-page-break/>
        <text:h text:style-name="P83" text:outline-level="1">3.1 <text:s/>Planificació i desglossament de tasques</text:h>
        <text:p text:style-name="Textbody"><draw:frame draw:style-name="a0" draw:name="Picture 2" text:anchor-type="as-char" svg:x="0in" svg:y="0in" svg:width="3.22639in" svg:height="2.28889in" style:rel-width="scale" style:rel-height="scale"><draw:image xlink:href="media/image1.jpeg" xlink:type="simple" xlink:show="embed" xlink:actuate="onLoad"/><svg:title/><svg:desc/></draw:frame></text:p>
        <text:p text:style-name="Textbody">Figura 1. Cronograma de desenvolupament del projecte (Diagrama de Gantt).</text:p>
        <text:h text:style-name="P84" text:outline-level="1"><text:span text:style-name="T85">4</text:span><text:span text:style-name="T86"><text:s text:c="2"/>Planificació del treball</text:span></text:h>
        <text:p text:style-name="P87">El desenvolupament del projecte es dividirà en les següents fases:</text:p>
        <text:list text:style-name="WWNum4">
          <text:list-item text:start-value="1">
            <text:p text:style-name="P88">Anàlisi del problema, revisió de conceptes ETL i estudi de les fonts de dades disponibles.</text:p>
          </text:list-item>
          <text:list-item>
            <text:p text:style-name="P89">Disseny de l’arquitectura del sistema i especificació dels fluxos de dades.</text:p>
          </text:list-item>
          <text:list-item>
            <text:p text:style-name="P90">Implementació dels processos d’extracció, transformació i càrrega per a cada font.</text:p>
          </text:list-item>
          <text:list-item>
            <text:p text:style-name="P91">Refactorització del codi: extracció dels helpers compartits i disseny config-driven.</text:p>
          </text:list-item>
          <text:list-item>
            <text:p text:style-name="P92">Proves, validació del sistema i mesura de la qualitat de les dades.</text:p>
          </text:list-item>
          <text:list-item>
            <text:p text:style-name="P93">Redacció de la memòria final del TFG i documentació tècnica per a col·laboradors.</text:p>
          </text:list-item>
        </text:list>
        <text:h text:style-name="P94" text:outline-level="1">5 Estat de l’art</text:h>
        <text:h text:style-name="P95" text:outline-level="2">5.1 Patrons ETL i data integration</text:h>
        <text:p text:style-name="P96">La literatura clàssica de data warehousing (Kimball &amp; Caserta, 2004; Inmon, 2005) defineix l’ETL com el procés de tres fases: extractor les dades d’un o més sistemes origen, transformar-les per garantir consistència i qualitat, i carregar-les en un destí centralitzat. Vassiliadis (2009) amplia aquesta definició destacant que la fase de transformació és la més complexa i la que més temps consumeix en projectes reals, principalment a causa de l’heterogeneïtàt dels formats origen i dels problemes de qualitat de les dades. En el context d’aquest projecte, aquesta problemàtica es manifesta en la coexistència de<text:s/>tres fonts (Outreach en CSV, ZoomInfo en CSV i LeadGenius en XLSX) amb convencions de columnes, codificacions de país i formats de telèfon completament diferents.</text:p>
        <text:p text:style-name="P97"><text:span text:style-name="T98">Des d’un punt de vista arquitectural, el sistema implementat s’enquadra en el patió de<text:s/></text:span><text:span text:style-name="T99">pipeline modular</text:span><text:span text:style-name="T100">, on cada etapa del procés és independent i comunicable mitjançant fitxers intermedis. Aquesta arquitectura, descrita per Silberschatz et al. (2019) en el context dels sistemes de bases de dades, maximitza la possibilitat de reprocessar una fase sense haver de tornar a executar el pipeline complet, i facilita la detecció i el aïllament d’errors.</text:span></text:p>
        <text:h text:style-name="P101" text:outline-level="2">5.2 Qualitat de dades en prospecció comercial</text:h>
        <text:p text:style-name="P102">La qualitat de les dades és un factor crític en qualsevol sistema ETL. Chen et al. (2012) identifiquen la inconsistència, la incompletesa i els duplicats com les tres principals dimensions de baixa qualitat en entorns de business intelligence. En el context de prospecció comercial, a aquestes dimensions s’hi afegeix la problemàtica específica de la validació d’adreces de correu electrònic i la detecció de contactes que han deixat l’empresa (registres obsolets). Els sistemes de detecció de gènere a partir del nom, com gender_guesser, s’utilitzen habitualment en solucions CRM per personalitzar la comunicació comercial (salutació, tractament formal), un requisit explícit en el pipeline implementat.</text:p>
        <text:p text:style-name="P103"><text:span text:style-name="T104">La tècnica de<text:s/></text:span><text:span text:style-name="T105">fuzzy matching</text:span><text:span text:style-name="T106"><text:s/>(fuzz.partial_ratio de fuzzywuzzy) és una aproximació estàndard per comparar cadenes de text amb petites variacions, com ara noms d’empresa lleugerament diferent entre la font origen i el CRM destí. El llindar del 75 % aplicat a la validació de correus i el del 50 % al domain score s’han calibrat empíricament a partir de proves sobre conjunts reals de prospectes, buscant un equilibri entre sensibilitat (detectar errors reals) i especificitat (no generar falsos positius excessius).</text:span></text:p>
        <text:h text:style-name="P107" text:outline-level="2">5.3 Refactorització i disseny config-driven</text:h>
        <text:p text:style-name="P108"><text:span text:style-name="T109">El patió de disseny<text:s/></text:span><text:span text:style-name="T110">configuration-driven</text:span><text:span text:style-name="T111"><text:s/>és un enfocament habitual en sistemes ETL de producció: en lloc de programar el comportament directament al codi, es parametritza en estructures de dades (diccionaris, fitxers YAML o JSON) que el motor llegeix en temps d’execució. Això separa la lògica (el motor) de la configuració (les regles específiques de cada font), reduint el volum de codi i el risc d’introduir errors en modificar el comportament d’una font sense afectar les altres. En el projecte, cada fitxer de part (part2, part3, part4) funciona essencialment com un fitxer de configuració executable, mentre que utils.py actua com el motor interpretador.</text:span></text:p>
        <text:soft-page-break/>
        <text:h text:style-name="P112" text:outline-level="1">6 Implementació</text:h>
        <text:h text:style-name="P113" text:outline-level="2">6.1 Arquitectura del pipeline</text:h>
        <text:p text:style-name="P114"><text:span text:style-name="T115">El sistema implementat és un pipeline ETL en Python organitzat en cinc scripts seqüencials. Cada script correspon a una fase del procés i es pot executar de manera independent, sempre que els fitxers d’entrada estiguin disponibles. La convenció de nomenclatura comparteix el prefix<text:s/></text:span><text:span text:style-name="T116">Nom_Tag</text:span><text:span text:style-name="T117"><text:s/>(p. ex. John_</text:span><text:span text:style-name="T118">BLITZ</text:span><text:span text:style-name="T119">) i el sufix identifica la font i el tipus de fitxer (John_</text:span><text:span text:style-name="T120">BLITZ</text:span><text:span text:style-name="T121">_ZI.csv, John_</text:span><text:span text:style-name="T122">BLITZ</text:span><text:span text:style-name="T123">_Accounts.csv, John_</text:span><text:span text:style-name="T124">BLITZ</text:span><text:span text:style-name="T125">_Deliverable.xlsx).</text:span></text:p>
        <text:p text:style-name="P126"><text:span text:style-name="T127">La<text:s/></text:span><text:span text:style-name="T128">Part 1</text:span><text:span text:style-name="T129"><text:s/>(part1_account_setup.py) carrega la llista de comptes del sol·licitant, l’enriqueix amb dades de país i lloc web provinents del CRM (1_Account Master Data Analytics_Report.xlsx), detecta duplicats i registres “dummy” i exporta el fitxer Nom_Tag_Accounts.csv. Les<text:s/></text:span><text:span text:style-name="T130">Parts 2, 3 i 4</text:span><text:span text:style-name="T131"><text:s/>processen les exportacions de prospectes d’Outreach, ZoomInfo i LeadGenius respectivament, totes tres recolzant-se en el motor compartit de utils.py. La<text:s/></text:span><text:span text:style-name="T132">Part 5</text:span><text:span text:style-name="T133"><text:s/>converteix els fitxers xlsx de prospectes a CSV per a la importació massiva a Outreach, fusionant les etiquetes actualitzades des del Deliverable.</text:span></text:p>
        <text:h text:style-name="P134" text:outline-level="2">6.2 Motor ETL compartit (utils.py)</text:h>
        <text:p text:style-name="P135"><text:span text:style-name="T136">La refactorització més rellevant del projecte ha estat l’extracció de tota la lògica comú en un mòdul compartit,<text:s/></text:span><text:span text:style-name="T137">utils.py</text:span><text:span text:style-name="T138">, que redueix cada part principal a aproximadament 100 línies de codi. El motor executa una seqüència fixada de passos: càrrega del fitxer font i dels comptes; filtratge de contactes verificats (només Part 4); correcció de tipus de dades; reanomenament de columnes següns<text:s/></text:span><text:span text:style-name="T139">rename_cols</text:span><text:span text:style-name="T140"><text:s/>del CONFIG; fusió amb els comptes per la clau adequada següns la<text:s/></text:span><text:span text:style-name="T141">merge_strategy</text:span><text:span text:style-name="T142"><text:s/>(custom_id, zi_fallback o company_name); reordenació de columnes; assignació d’IDs de prospecte amb prefix O/Z/L; filtre de mateix país (Part 3); conversió a ISO alpha-2; i formatació de telèfons a E.164 (Part 4).</text:span></text:p>
        <text:p text:style-name="P143"><text:span text:style-name="T144">El CONFIG centralitza totes les decisions específiques de cada font. Gràcies a aquest disseny, incorporar una nova font de dades només requereix definir un nou CONFIG sense modificar el motor compartit. Això s’alinea directament amb el principi<text:s/></text:span><text:span text:style-name="T145">Open/Closed</text:span><text:span text:style-name="T146"><text:s/>del disseny de programari: el sistema està obert a l’extensió però tancat a la modificació.</text:span></text:p>
        <text:h text:style-name="P147" text:outline-level="2">6.3 Validació de la qualitat de les dades</text:h>
        <text:p text:style-name="P148"><text:span text:style-name="T149">La funció run_validation_checks de utils.py aplica deu comprovacions seqüencials a cada registre de la font activa i escriu indicadors d’incidència separats per “+” a la columna Issue:<text:s/></text:span><text:span text:style-name="T150">Bad Email Format</text:span><text:span text:style-name="T151"><text:s/>(regex estàndard);<text:s/></text:span><text:span text:style-name="T152">Private Email</text:span><text:span text:style-name="T153"><text:s/>(domini personal—Gmail, Yahoo, Hotmail, etc.);<text:s/></text:span><text:span text:style-name="T154">Bad Name</text:span><text:span text:style-name="T155"><text:s/>(nom o cognom buit);<text:s/></text:span><text:span text:style-name="T156">Bad Email</text:span><text:span text:style-name="T157"><text:s/>(coincidència difusa &lt;75 % amb el nom via fuzzywuzzy);<text:s/></text:span><text:span text:style-name="T158">Bad Domain</text:span><text:span text:style-name="T159"><text:s/>(puntuació &lt;50 entre domini del correu i nom del compte, després d’eliminar sufixos legals en més de 20 idiomes);<text:s/></text:span><text:span text:style-name="T160">Bad LinkedIn</text:span><text:span text:style-name="T161">;<text:s/></text:span><text:span text:style-name="T162">Bad Country</text:span><text:span text:style-name="T163"><text:s/>(només Part 4);<text:s/></text:span><text:span text:style-name="T164">Bad Gender</text:span><text:span text:style-name="T165"><text:s/>(Parts 2 i 4);<text:s/></text:span><text:span text:style-name="T166">Unknown Gender</text:span><text:span text:style-name="T167">; i<text:s/></text:span><text:span text:style-name="T168">Duplicate</text:span><text:span text:style-name="T169"><text:s/>(nom complet o invertit repetit).</text:span></text:p>
        <text:p text:style-name="P170">Després de la validació, el sistema exporta Nom_Tag_Prospect Issues.xlsx amb autofiltres i amplada de columna automàtica, i fa una pausa per permetre la revisió manual. Quan l’analista ha corregit els registres i prem Enter, el motor reimporta la versió editada i torna a fusionar les columnes no editables des de la mostra original, evitant pèrdues accidentals d’informació.</text:p>
        <text:h text:style-name="P171" text:outline-level="2">6.4 Sortides del sistema</text:h>
        <text:p text:style-name="P172"><text:span text:style-name="T173">Cada execució de les Parts 2, 3 o 4 genera quatre fitxers de sortida. El<text:s/></text:span><text:span text:style-name="T174">Nom_Tag_[Font] Prospects.xlsx</text:span><text:span text:style-name="T175"><text:s/>conté la llista completa de prospectes enriquits. El<text:s/></text:span><text:span text:style-name="T176">Nom_Tag_Deliverable.xlsx</text:span><text:span text:style-name="T177"><text:s/>és el fitxer de lliurament amb tres fulls: Prospects (protegit, amb desplegable d’Issue Category i columnes de Comments editables), Accounts without Prospects i Prospect Upload (plantilla manual amb desplegables de gènere, font i país). A més, el<text:s/></text:span><text:span text:style-name="T178">Nom_Tag_Emails.csv</text:span><text:span text:style-name="T179"><text:s/>i el<text:s/></text:span><text:span text:style-name="T180">Nom_Tag_Accounts with Insufficient Prospects.csv</text:span><text:span text:style-name="T181"><text:s/>completen el conjunt de sortides.</text:span></text:p>
        <text:h text:style-name="P182" text:outline-level="1">7 Resultats i discussió</text:h>
        <text:h text:style-name="P183" text:outline-level="2">7.1 Impacte de la refactorització</text:h>
        <text:p text:style-name="P184">La refactorització config-driven ha tingut un impacte mesurable sobre la mantenibilitat del codi. Abans de la refactorització, les Parts 2, 3 i 4 sumaven aproximadament 1.400 línies en total, amb funcions com clean_text, detect_gender, fuzzy_match_company i format_phone duplicades en cada fitxer. Després de la refactorització, els mateixos tres scripts sumen menys de 300 línies de codi específic de font, mentre que utils.py concentra tota la lògica compartida en un única localització. Una correcció o millora a qualsevol funció de validació es propaga automàticament a les tres fonts sense cap canvi addicional.</text:p>
        <text:p text:style-name="P185">Des del punt de vista de l’extensibilitat, el disseny config-driven ha demostrat la seva utilitat pràctica: l’addició del suport per a LeadGenius (Part 4) sobre l’arquitectura refactoritzada va requerir només definir el seu CONFIG i les entrades interactives específiques, reutilitzant el 100 % del motor. Sense la refactorització, hauria calgut copiar i adaptar ~400 línies de codi addicionals.</text:p>
        <text:h text:style-name="P186" text:outline-level="2">7.2 Qualitat de les dades: observacions empíriques</text:h>
        <text:p text:style-name="P187">En execucions de prova amb conjunts reals de prospectes, les incidències més freqüents detectades pel sistema han estat, per ordre de freqüència: Unknown Gender (noms poc comuns o d’origen no occidental no reconeguts per<text:s/><text:soft-page-break/>gender_guesser), Bad Domain (empreses que utilitzen un domini de correu diferent al nom comercial, p. ex. filials o marques), i Duplicate (contactes presents a més d’una font d’origen). Aquests patrons són consistents amb la literatura sobre qualitat de dades en entorns CRM (Chen et al., 2012) i confirmen la utilitat de les comprovacions implementades.</text:p>
        <text:p text:style-name="P188">El filtre de mateix país de la Part 3 ha demostrat ser especialment crític per a les exportacions de ZoomInfo, que habitualment inclouen contactes de països no objectiu en les cerques per empresa. Sense aquest filtre, fins a un 15-20 % dels registres ZoomInfo podrien correspondré a oficines internacionals fora de l’àmbit geogràfic del projecte de prospecció. La formatació de telèfons E.164 de la Part 4 ha resolt de forma automàtica la majoria de les inconsistències de format (números locals sense prefix de país, espais i guions), reduint la necessitat de correcció manual en el pas de revisió.</text:p>
        <text:h text:style-name="P189" text:outline-level="2">7.3 Estadístiques de lliurament</text:h>
        <text:p text:style-name="P190">El sistema calcula automàticament estadístiques d’enriquiment al final de cada execució: nombre de comptes enviats, nombre de prospectes trobats (total i filtrats al deliverable), nombre de prospectes amb correu electrònic, nombre amb URL de LinkedIn, nombre de comptes amb prospectes i taxa d’enriquiment (percentatge de comptes coberts). Aquestes mètriques permeten avaluar ràpidament la cobertura d’un lliurament i identificar si cal sol·licitar prospectes addicionals a alguna font.</text:p>
        <text:p text:style-name="P191"><text:span text:style-name="T192">La lògica de<text:s/></text:span><text:span text:style-name="T193"># Prospects/Account Range</text:span><text:span text:style-name="T194"><text:s/>assigna el valor “OK” als prospectes dins del llindar sol·licitat i “Extra N” als que el superen, cosa que permet a l’analista identificar ràpidament els comptes sobre-coberts i prioritzar els que estan per sota del llindar al fitxer d’insufficient prospects.</text:span></text:p>
        <text:h text:style-name="P195" text:outline-level="1">8<text:tab/>Conclusió</text:h>
        <text:p text:style-name="P196"><text:span text:style-name="T197">El present treball ha demostrat la viabilitat de construir un pipeline ETL modular i config-driven per a la consolidació de dades de prospecció comercial provinents de fonts heterogènies. La solució implementada cobreix el flux complet: des de la preparació dels comptes fins a la generació dels fitxers de lliurament, passant per la validació automàtica de la qualitat de les dades.</text:span></text:p>
        <text:p text:style-name="P198"><text:span text:style-name="T199">La refactorització ha reduït les Parts 2, 3 i 4 de scripts monolítics de 400-600 línies a fitxers de configuració d’aproximadament 100 línies cadascun, mentre utils.py centralitza la lògica compartida. Això redueix el risc d’inconsistències entre fonts, facilita el manteniment i permet incorporar noves fonts definint només un nou diccionari CONFIG. Les deu comprovacions automàtiques de qualitat han demostrat ser efectives en la detecció dels errors més freqüents en dades de prospecció comercial (correus invàlids,<text:s/></text:span><text:span text:style-name="T200">duplicats, discrepàncies de gènere i de país).</text:span></text:p>
        <text:p text:style-name="P201"><text:span text:style-name="T202">Com a limitació principal, el sistema requereix una intervenció manual al pas de revisió d’incidències. Malgrat que aquest pas garanteix la superioritat de la revisió humana per a casos ambigus, suposa un punt de bloqueig en el flux automàtic. En el treball futur es proposen mecanismes per reduir la fricció d’aquest pas.</text:span></text:p>
        <text:p text:style-name="P203">Agraïments</text:p>
        <text:p text:style-name="P204">-</text:p>
        <text:p text:style-name="P205">Bibliografia</text:p>
        <text:list text:style-name="WWNum2">
          <text:list-item text:start-value="1">
            <text:p text:style-name="P206"><text:span text:style-name="T207">Kimball, R., &amp; Caserta, J. (2004).<text:s/></text:span><text:span text:style-name="T208">The Data Warehouse ETL Toolkit</text:span><text:span text:style-name="T209">. Wiley.</text:span></text:p>
          </text:list-item>
          <text:list-item>
            <text:p text:style-name="P210"><text:span text:style-name="T211">Inmon, W. H. (2005).<text:s/></text:span><text:span text:style-name="T212">Building the Data Warehouse</text:span><text:span text:style-name="T213">. Wiley.</text:span></text:p>
          </text:list-item>
          <text:list-item>
            <text:p text:style-name="P214"><text:span text:style-name="T215">Silberschatz, A., Korth, H., &amp; Sudarshan, S. (2019).<text:s/></text:span><text:span text:style-name="T216">Database System Concepts</text:span><text:span text:style-name="T217">. McGraw-Hill.</text:span></text:p>
          </text:list-item>
          <text:list-item>
            <text:p text:style-name="P218"><text:span text:style-name="T219">Vassiliadis, P. (2009).<text:s/></text:span><text:span text:style-name="T220">A Survey of Extract-Transform-Load Technology</text:span><text:span text:style-name="T221">. International Journal of Data Warehousing and Mining.</text:span></text:p>
          </text:list-item>
          <text:list-item>
            <text:p text:style-name="P222"><text:span text:style-name="T223">Chen, H., Chiang, R., &amp; Storey, V. (2012).<text:s/></text:span><text:span text:style-name="T224">Business Intelligence and Analytics: From Big Data to Big Impact</text:span><text:span text:style-name="T225">. MIS Quarterly.</text:span></text:p>
          </text:list-item>
          <text:list-item>
            <text:p text:style-name="P226"><text:span text:style-name="T227">Ascarza, E. et al. (2017).<text:s/></text:span><text:span text:style-name="T228">In Pursuit of Enhanced Customer Retention Management</text:span><text:span text:style-name="T229">. Customer Needs and Solutions. Harvard Business School.</text:span></text:p>
          </text:list-item>
          <text:list-item>
            <text:p text:style-name="P230"><text:span text:style-name="T231">Min, S., Zhang, X., Kim, N., &amp; Srivastava, R. K. (2016).<text:s/></text:span><text:span text:style-name="T232">Customer Acquisition and Retention Spending: An Analytical Model and Empirical Investigation in Wireless Telecommunications Markets</text:span><text:span text:style-name="T233">. Journal of Marketing Research.</text:span></text:p>
          </text:list-item>
        </text:list>
        <text:p text:style-name="P234"/>
      </text:section>
      <text:soft-page-break/>
      <text:p text:style-name="P235">APÈNDIX</text:p>
      <text:p text:style-name="P247">A1. Claus del diccionari CONFIG</text:p>
      <text:p text:style-name="P248">Cada script de les Parts 2, 3 i 4 defineix un diccionari CONFIG amb les claus següents: source_label (nom de la font), prospect_id_prefix (O/Z/L), reader (csv o xlsx), sheet (full de l’Excel), filter_verified (Part 4), rename_cols, desired_columns, columns_to_delete, merge_strategy (custom_id / zi_fallback / company_name), filter_same_country, convert_country, convert_account_country, format_phones, validation – include_bad_gender / include_bad_country, optional_inputs, issue_cols, prospects_output, drop_from_prospects_export, deliverable_extra_cols i source_from_zi.</text:p>
      <text:p text:style-name="P249">A2. Convencions de nomenclatura dels fitxers</text:p>
      <text:p text:style-name="P250">Prefix Nom_Tag compartit (p. ex. John_BLITZ). Sufixos: Nom_Tag_Accounts.xlsx (entrada Part 1), Nom_Tag_Accounts.csv (sortida Part 1), Nom_Tag_Outreach.csv / ZI.csv / LG.xlsx (exportacions de les fonts), Nom_Tag_Prospect Issues.xlsx (revisió manual), Nom_Tag_Outreach Prospects.xlsx, Nom_Tag_ZI Prospects.xlsx, Nom_Tag_LG Prospects.xlsx, Nom_Tag_Deliverable.xlsx, Nom_Tag_Emails.csv, Nom_Tag_Accounts with Insufficient Prospects.csv, Nom_Tag_Prospect Upload.csv (Part 5, només si hi ha dades manuals).</text:p>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Reference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Palatino" svg:font-family="Palatino" style:font-family-generic="roman" style:font-pitch="variable"/>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ProgramThree" svg:font-family="ProgramThree" style:font-family-generic="roman" style:font-pitch="variable"/>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Helvetica Condensed" svg:font-family="Helvetica Condensed"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style:font-face style:name="SimHei" svg:font-family="SimHei" style:font-family-generic="modern" style:font-pitch="fixed" svg:panose-1="2 1 6 0 3 1 1 1 1 1"/>
    <style:font-face style:name="72 Brand Medium" svg:font-family="72 Brand Medium" style:font-family-generic="swiss" style:font-pitch="variable" svg:panose-1="2 11 6 4 3 6 3 2 2 4"/>
    <style:font-face style:name="SimSun" svg:font-family="SimSun" style:font-family-generic="system" style:font-pitch="variable" svg:panose-1="2 1 6 0 3 1 1 1 1 1"/>
    <style:font-face style:name="72 Brand" svg:font-family="72 Brand" style:font-family-generic="swiss" style:font-pitch="variable" svg:panose-1="2 11 5 4 3 6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PARAGRAPH" style:next-style-name="PARAGRAPHnoindent" style:default-outline-level="1">
      <style:paragraph-properties fo:keep-with-next="always" fo:text-align="start" fo:margin-top="0.2222in" fo:margin-bottom="0.0555in" fo:line-height="0.1805in" fo:margin-left="0.2222in" fo:text-indent="-0.2222in">
        <style:tab-stops/>
      </style:paragraph-properties>
      <style:text-properties style:font-name="Helvetica" style:font-name-asian="Helvetica" style:font-name-complex="Helvetica" fo:font-weight="bold" style:font-weight-asian="bold" fo:font-variant="small-caps" fo:font-size="11.5pt" style:font-size-asian="11.5pt" fo:hyphenate="false"/>
    </style:style>
    <style:style style:name="Heading2" style:display-name="Heading 2" style:family="paragraph" style:parent-style-name="Heading1" style:next-style-name="PARAGRAPHnoindent" style:default-outline-level="2">
      <style:paragraph-properties fo:margin-top="0.1111in" fo:margin-bottom="0.0277in" fo:line-height="0.1527in" fo:margin-left="0.25in" fo:text-indent="-0.25in">
        <style:tab-stops/>
      </style:paragraph-properties>
      <style:text-properties fo:font-variant="normal" fo:font-size="10pt" style:font-size-asian="10pt" fo:hyphenate="false"/>
    </style:style>
    <style:style style:name="Heading3" style:display-name="Heading 3" style:family="paragraph" style:parent-style-name="Heading2" style:next-style-name="PARAGRAPHnoindent" style:default-outline-level="3">
      <style:paragraph-properties fo:margin-left="0.3611in" fo:text-indent="-0.3611in">
        <style:tab-stops/>
      </style:paragraph-properties>
      <style:text-properties fo:font-weight="normal" style:font-weight-asian="normal" fo:font-style="italic" style:font-style-asian="italic" fo:hyphenate="false"/>
    </style:style>
    <style:style style:name="Heading4" style:display-name="Heading 4" style:family="paragraph" style:parent-style-name="Standard" style:next-style-name="PARAGRAPHnoindent" style:default-outline-level="4">
      <style:paragraph-properties fo:line-height="0.1666in" fo:margin-left="0.25in" fo:text-indent="0.15in">
        <style:tab-stops/>
      </style:paragraph-properties>
      <style:text-properties style:font-name="Times New Roman" fo:font-size="12pt" style:font-size-asian="12pt" style:text-underline-type="single" style:text-underline-style="solid" style:text-underline-width="auto" style:text-underline-mode="continuous"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fo:margin-bottom="0.1388in" fo:line-height="0.1597in"/>
      <style:text-properties style:font-name="Palatino" style:letter-kerning="true" fo:font-size="9.5pt" style:font-size-asian="9.5pt"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 style:display-name="List" style:family="paragraph" style:parent-style-name="Textbody">
      <style:text-properties style:font-name-complex="Arial" fo:hyphenate="tru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Arial" fo:hyphenate="true"/>
    </style:style>
    <style:style style:name="PARAGRAPH" style:display-name="PARAGRAPH" style:family="paragraph" style:parent-style-name="Standard">
      <style:paragraph-properties fo:text-indent="0.1666in"/>
      <style:text-properties fo:hyphenate="true"/>
    </style:style>
    <style:style style:name="PARAGRAPHnoindent" style:display-name="PARAGRAPH (no indent)" style:family="paragraph" style:parent-style-name="PARAGRAPH" style:next-style-name="PARAGRAPH">
      <style:paragraph-properties fo:text-indent="0in"/>
      <style:text-properties fo:hyphenate="true"/>
    </style:style>
    <style:style style:name="Footnote" style:display-name="Footnote" style:family="paragraph" style:parent-style-name="PARAGRAPHnoindent">
      <style:paragraph-properties fo:line-height="0.118in" fo:text-indent="0.1in"/>
      <style:text-properties fo:font-size="7.5pt" style:font-size-asian="7.5pt" fo:hyphenate="true"/>
    </style:style>
    <style:style style:name="ARTICLETITLE" style:display-name="ARTICLE TITLE" style:family="paragraph" style:parent-style-name="PARAGRAPHnoindent">
      <style:paragraph-properties fo:text-align="center" fo:margin-bottom="0.1111in" fo:line-height="0.3888in"/>
      <style:text-properties style:font-name="Helvetica" style:font-name-asian="Helvetica" style:font-name-complex="Helvetica" fo:letter-spacing="0.0041in" fo:font-size="24pt" style:font-size-asian="24pt" fo:hyphenate="false"/>
    </style:style>
    <style:style style:name="AUTHOR" style:display-name="AUTHOR" style:family="paragraph" style:parent-style-name="ARTICLETITLE" style:next-style-name="Standard">
      <style:paragraph-properties fo:margin-bottom="0.3333in" fo:line-height="0.1944in"/>
      <style:text-properties fo:letter-spacing="0.0034in" fo:font-size="11pt" style:font-size-asian="11pt" fo:hyphenate="false"/>
    </style:style>
    <style:style style:name="TABLEFOOTNOTE" style:display-name="TABLE FOOTNOTE" style:family="paragraph" style:parent-style-name="Standard">
      <style:paragraph-properties fo:text-align="start"/>
      <style:text-properties fo:font-style="italic" style:font-style-asian="italic" fo:font-size="8pt" style:font-size-asian="8pt" fo:hyphenate="true"/>
    </style:style>
    <style:style style:name="HeaderandFooter" style:display-name="Header and Footer" style:family="paragraph" style:parent-style-name="Standard">
      <style:text-properties fo:hyphenate="true"/>
    </style:style>
    <style:style style:name="Header" style:display-name="Header" style:family="paragraph" style:parent-style-name="Standard">
      <style:paragraph-properties fo:line-height="0.1527in">
        <style:tab-stops>
          <style:tab-stop style:type="right" style:position="7.0833in"/>
        </style:tab-stops>
      </style:paragraph-properties>
      <style:text-properties style:font-name="Helvetica" style:font-name-asian="Helvetica" style:font-name-complex="Helvetica" fo:text-transform="uppercase" fo:font-size="7pt" style:font-size-asian="7pt" fo:hyphenate="true"/>
    </style:style>
    <style:style style:name="ABSTRACT" style:display-name="ABSTRACT" style:family="paragraph" style:parent-style-name="PARAGRAPH">
      <style:paragraph-properties fo:text-align="start" fo:margin-bottom="0.1666in" fo:line-height="0.1458in" fo:margin-left="0.3333in" fo:margin-right="0.3333in" fo:text-indent="0in">
        <style:tab-stops/>
      </style:paragraph-properties>
      <style:text-properties style:font-name="Helvetica" style:font-name-asian="Helvetica" style:font-name-complex="Helvetica" fo:font-size="8pt" style:font-size-asian="8pt" fo:hyphenate="false"/>
    </style:style>
    <style:style style:name="TABLEROW" style:display-name="TABLE ROW" style:family="paragraph" style:parent-style-name="Standard">
      <style:paragraph-properties fo:text-align="center" fo:margin-top="0.0138in" fo:margin-bottom="0.0138in" fo:line-height="0.125in"/>
      <style:text-properties style:font-name="Helvetica" style:font-name-asian="Helvetica" style:font-name-complex="Helvetica" fo:font-size="8pt" style:font-size-asian="8pt" fo:hyphenate="true"/>
    </style:style>
    <style:style style:name="TABLECOLUMNHEADER" style:display-name="TABLE COLUMN HEADER" style:family="paragraph" style:parent-style-name="TABLEROW" style:next-style-name="TABLEROW">
      <style:paragraph-properties fo:margin-top="0.0277in" fo:margin-bottom="0.0277in"/>
      <style:text-properties fo:font-size="9pt" style:font-size-asian="9pt" fo:hyphenate="true"/>
    </style:style>
    <style:style style:name="TABLETITLE" style:display-name="TABLE TITLE" style:family="paragraph" style:parent-style-name="Standard" style:next-style-name="TABLECOLUMNHEADER">
      <style:paragraph-properties fo:keep-with-next="always" fo:text-align="center" fo:margin-bottom="0.0555in" fo:line-height="0.1388in"/>
      <style:text-properties style:font-name="Helvetica" style:font-name-asian="Helvetica" style:font-name-complex="Helvetica" fo:font-variant="small-caps" fo:color="#000000" fo:hyphenate="true"/>
    </style:style>
    <style:style style:name="FIGURECAPTION" style:display-name="FIGURE CAPTION" style:family="paragraph" style:parent-style-name="PARAGRAPHnoindent">
      <style:paragraph-properties fo:margin-bottom="0.2222in" fo:line-height="0.125in"/>
      <style:text-properties style:font-name="Helvetica" style:font-name-asian="Helvetica" style:font-name-complex="Helvetica" fo:font-size="8pt" style:font-size-asian="8pt" fo:hyphenate="true"/>
    </style:style>
    <style:style style:name="QUOTATIONBLOCKSTYLE" style:display-name="QUOTATION BLOCK STYLE" style:family="paragraph" style:parent-style-name="PARAGRAPHnoindent">
      <style:paragraph-properties fo:margin-top="0.0555in" fo:margin-bottom="0.0555in" fo:margin-left="0.1666in" fo:margin-right="0.1666in">
        <style:tab-stops/>
      </style:paragraph-properties>
      <style:text-properties fo:font-size="8pt" style:font-size-asian="8pt" fo:hyphenate="true"/>
    </style:style>
    <style:style style:name="LISTTYPE2aNumber" style:display-name="LIST TYPE 2a (Number)" style:family="paragraph" style:parent-style-name="LISTTYPE2Number" style:next-style-name="LISTTYPE2Number" style:list-style-name="WWNum1">
      <style:paragraph-properties fo:margin-top="0.0555in"/>
      <style:text-properties fo:hyphenate="true"/>
    </style:style>
    <style:style style:name="LISTTYPE2Number" style:display-name="LIST TYPE 2 (Number)" style:family="paragraph" style:parent-style-name="LISTTYPE1Bullet" style:list-style-name="WWNum1">
      <style:text-properties fo:hyphenate="true"/>
    </style:style>
    <style:style style:name="LISTTYPE1Bullet" style:display-name="LIST TYPE 1 (Bullet)" style:family="paragraph" style:parent-style-name="PARAGRAPH" style:list-style-name="WWNum1">
      <style:text-properties fo:hyphenate="true"/>
    </style:style>
    <style:style style:name="BIB.REF.TEXT" style:display-name="BIB. REF. TEXT" style:family="paragraph" style:parent-style-name="PARAGRAPHnoindent">
      <style:paragraph-properties fo:widows="2" fo:orphans="2" fo:line-height="0.125in" fo:margin-left="0.25in" fo:text-indent="-0.25in">
        <style:tab-stops>
          <style:tab-stop style:type="left" style:position="0.3in"/>
        </style:tab-stops>
      </style:paragraph-properties>
      <style:text-properties fo:font-size="8pt" style:font-size-asian="8pt" fo:hyphenate="true"/>
    </style:style>
    <style:style style:name="CCCLINE" style:display-name="CCC LINE" style:family="paragraph" style:parent-style-name="PARAGRAPHnoindent">
      <style:paragraph-properties fo:text-align="center" fo:line-height="0.1111in"/>
      <style:text-properties style:font-name="Helvetica" style:font-name-asian="Helvetica" style:font-name-complex="Helvetica" fo:letter-spacing="0.0041in" fo:font-size="6pt" style:font-size-asian="6pt" fo:hyphenate="true"/>
    </style:style>
    <style:style style:name="PROGRAMSEGMENT" style:display-name="PROGRAM SEGMENT" style:family="paragraph" style:parent-style-name="PARAGRAPHnoindent">
      <style:paragraph-properties fo:text-align="start" fo:line-height="0.1388in" fo:margin-left="0.1666in" fo:margin-right="0.1666in">
        <style:tab-stops>
          <style:tab-stop style:type="left" style:position="0.1388in"/>
          <style:tab-stop style:type="left" style:position="0.2777in"/>
          <style:tab-stop style:type="left" style:position="0.4166in"/>
          <style:tab-stop style:type="left" style:position="0.5555in"/>
          <style:tab-stop style:type="left" style:position="0.6944in"/>
          <style:tab-stop style:type="left" style:position="0.8333in"/>
          <style:tab-stop style:type="left" style:position="0.9722in"/>
          <style:tab-stop style:type="left" style:position="1.1111in"/>
          <style:tab-stop style:type="left" style:position="1.25in"/>
          <style:tab-stop style:type="left" style:position="1.3888in"/>
          <style:tab-stop style:type="left" style:position="1.5277in"/>
          <style:tab-stop style:type="left" style:position="1.6666in"/>
          <style:tab-stop style:type="left" style:position="1.8055in"/>
          <style:tab-stop style:type="left" style:position="1.9444in"/>
          <style:tab-stop style:type="left" style:position="2.0833in"/>
          <style:tab-stop style:type="left" style:position="2.2222in"/>
          <style:tab-stop style:type="left" style:position="2.3611in"/>
          <style:tab-stop style:type="left" style:position="2.5in"/>
          <style:tab-stop style:type="left" style:position="2.6388in"/>
          <style:tab-stop style:type="left" style:position="2.7777in"/>
          <style:tab-stop style:type="left" style:position="2.9166in"/>
          <style:tab-stop style:type="left" style:position="3.0555in"/>
          <style:tab-stop style:type="left" style:position="3.1944in"/>
          <style:tab-stop style:type="left" style:position="3.3333in"/>
          <style:tab-stop style:type="left" style:position="3.4722in"/>
        </style:tab-stops>
      </style:paragraph-properties>
      <style:text-properties style:font-name="ProgramThree" style:font-name-asian="ProgramThree" style:font-name-complex="ProgramThree" fo:font-size="9pt" style:font-size-asian="9pt" fo:hyphenate="true"/>
    </style:style>
    <style:style style:name="LISTTYPE1aBullet" style:display-name="LIST TYPE 1a (Bullet)" style:family="paragraph" style:parent-style-name="LISTTYPE1Bullet" style:next-style-name="LISTTYPE1Bullet" style:list-style-name="WWNum1">
      <style:paragraph-properties fo:margin-top="0.0555in"/>
      <style:text-properties fo:hyphenate="true"/>
    </style:style>
    <style:style style:name="LISTTYPE2zNumber" style:display-name="LIST TYPE 2z (Number)" style:family="paragraph" style:parent-style-name="LISTTYPE2Number" style:next-style-name="PARAGRAPH" style:list-style-name="WWNum1">
      <style:paragraph-properties fo:margin-bottom="0.0555in"/>
      <style:text-properties fo:hyphenate="true"/>
    </style:style>
    <style:style style:name="VITA" style:display-name="VITA" style:family="paragraph" style:parent-style-name="PARAGRAPHnoindent">
      <style:paragraph-properties fo:line-height="0.125in">
        <style:tab-stops>
          <style:tab-stop style:type="left" style:position="0.15in"/>
        </style:tab-stops>
      </style:paragraph-properties>
      <style:text-properties style:font-name="Helvetica" style:font-name-asian="Helvetica" style:font-name-complex="Helvetica" fo:font-size="8pt" style:font-size-asian="8pt" fo:hyphenate="true"/>
    </style:style>
    <style:style style:name="LISTTYPE1zBullet" style:display-name="LIST TYPE 1z (Bullet)" style:family="paragraph" style:parent-style-name="LISTTYPE1Bullet" style:next-style-name="PARAGRAPH" style:list-style-name="WWNum1">
      <style:paragraph-properties fo:margin-bottom="0.0555in"/>
      <style:text-properties fo:hyphenate="true"/>
    </style:style>
    <style:style style:name="FIGUREBODY" style:display-name="FIGURE BODY" style:family="paragraph" style:parent-style-name="PROGRAMSEGMENT">
      <style:paragraph-properties fo:line-height="0.125in"/>
      <style:text-properties style:font-name="Palatino" style:font-name-asian="Palatino" style:font-name-complex="Palatino" fo:font-size="8pt" style:font-size-asian="8pt" fo:hyphenate="true"/>
    </style:style>
    <style:style style:name="FORMULA" style:display-name="FORMULA" style:family="paragraph" style:parent-style-name="Standard">
      <style:paragraph-properties fo:text-align="center" fo:margin-top="0.0555in" fo:margin-bottom="0.0555in" style:line-height-at-least="0.1666in"/>
      <style:text-properties fo:hyphenate="tru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true"/>
    </style:style>
    <style:style style:name="ACK.HEAD" style:display-name="ACK. HEAD" style:family="paragraph" style:parent-style-name="Heading1" style:next-style-name="ACKNOWLEDGMENTS" style:default-outline-level="1">
      <style:text-properties fo:hyphenate="false"/>
    </style:style>
    <style:style style:name="ACKNOWLEDGMENTS" style:display-name="ACKNOWLEDGMENTS" style:family="paragraph" style:parent-style-name="PARAGRAPHnoindent">
      <style:text-properties fo:hyphenate="true"/>
    </style:style>
    <style:style style:name="ART" style:display-name="ART" style:family="paragraph" style:parent-style-name="Standard" style:next-style-name="Standard">
      <style:paragraph-properties fo:keep-with-next="always" fo:text-align="center" fo:margin-top="0.1666in" fo:margin-bottom="0.1111in" style:line-height-at-least="0.1527in"/>
      <style:text-properties fo:hyphenate="true"/>
    </style:style>
    <style:style style:name="AUTHORAFFILIATION" style:display-name="AUTHOR AFFILIATION" style:family="paragraph" style:parent-style-name="PARAGRAPHnoindent">
      <style:paragraph-properties fo:line-height="0.125in"/>
      <style:text-properties fo:font-style="italic" style:font-style-asian="italic" fo:font-size="8pt" style:font-size-asian="8pt" fo:hyphenate="true"/>
    </style:style>
    <style:style style:name="BIB.HEAD" style:display-name="BIB. HEAD" style:family="paragraph" style:parent-style-name="Heading1" style:next-style-name="BIB.REF.TEXT" style:default-outline-level="1">
      <style:text-properties fo:hyphenate="false"/>
    </style:style>
    <style:style style:name="CONCLUSION" style:display-name="CONCLUSION" style:family="paragraph" style:parent-style-name="PARAGRAPHnoindent" style:next-style-name="PARAGRAPH">
      <style:text-properties fo:hyphenate="true"/>
    </style:style>
    <style:style style:name="FOOTNOTE0" style:display-name="FOOTNOTE" style:family="paragraph" style:parent-style-name="Footnote">
      <style:text-properties fo:hyphenate="true"/>
    </style:style>
    <style:style style:name="INTRODUCTION" style:display-name="INTRODUCTION" style:family="paragraph" style:parent-style-name="PARAGRAPHnoindent" style:next-style-name="PARAGRAPH">
      <style:text-properties fo:hyphenate="true"/>
    </style:style>
    <style:style style:name="KEYWORD" style:display-name="KEY WORD" style:family="paragraph" style:parent-style-name="ABSTRACT" style:next-style-name="Standard">
      <style:paragraph-properties fo:margin-bottom="0in"/>
      <style:text-properties fo:hyphenate="false"/>
    </style:style>
    <style:style style:name="FigureCaption0" style:display-name="Figure Caption" style:family="paragraph" style:parent-style-name="Standard">
      <style:paragraph-properties fo:widows="2" fo:orphans="2" fo:line-height="100%"/>
      <style:text-properties style:font-name="Times New Roman" style:letter-kerning="false" fo:font-size="8pt" style:font-size-asian="8pt" style:font-size-complex="8pt" fo:hyphenate="true"/>
    </style:style>
    <style:style style:name="Text" style:display-name="Text" style:family="paragraph" style:parent-style-name="Standard">
      <style:paragraph-properties fo:line-height="104%" fo:text-indent="0.1402in"/>
      <style:text-properties style:font-name="Times New Roman" style:letter-kerning="false" fo:font-size="10pt" style:font-size-asian="10pt" fo:hyphenate="true"/>
    </style:style>
    <style:style style:name="Equation" style:display-name="Equation" style:family="paragraph" style:parent-style-name="Standard" style:next-style-name="Standard">
      <style:paragraph-properties fo:line-height="104%">
        <style:tab-stops>
          <style:tab-stop style:type="right" style:position="3.5in"/>
        </style:tab-stops>
      </style:paragraph-properties>
      <style:text-properties style:font-name="Times New Roman" style:letter-kerning="false" fo:font-size="10pt" style:font-size-asian="10pt" fo:hyphenate="true"/>
    </style:style>
    <style:style style:name="ReferenceHead" style:display-name="Reference Head" style:family="paragraph" style:parent-style-name="Heading1" style:default-outline-level="1">
      <style:paragraph-properties fo:widows="2" fo:orphans="2" fo:text-align="center" fo:margin-top="0.1666in" fo:line-height="100%" fo:margin-left="0in" fo:text-indent="0in">
        <style:tab-stops/>
      </style:paragraph-properties>
      <style:text-properties style:font-name="Times New Roman" style:font-name-asian="Times New Roman" style:font-name-complex="Times New Roman" fo:font-weight="normal" style:font-weight-asian="normal" fo:font-size="10pt" style:font-size-asian="10pt" fo:hyphenate="true"/>
    </style:style>
    <style:style style:name="References" style:display-name="References" style:family="paragraph" style:parent-style-name="Standard">
      <style:paragraph-properties fo:widows="2" fo:orphans="2" fo:line-height="100%"/>
      <style:text-properties style:font-name="Times New Roman" style:letter-kerning="false" fo:font-size="8pt" style:font-size-asian="8pt" style:font-size-complex="8pt" fo:hyphenate="true"/>
    </style:style>
    <style:style style:name="TableTitle0" style:display-name="Table Title" style:family="paragraph" style:parent-style-name="Standard">
      <style:paragraph-properties fo:widows="2" fo:orphans="2" fo:text-align="center" fo:line-height="100%"/>
      <style:text-properties style:font-name="Times New Roman" fo:font-variant="small-caps" style:letter-kerning="false" fo:font-size="8pt" style:font-size-asian="8pt" style:font-size-complex="8pt" fo:hyphenate="true"/>
    </style:style>
    <style:style style:name="NormalWeb" style:display-name="Normal (Web)" style:family="paragraph" style:parent-style-name="Standard">
      <style:paragraph-properties fo:widows="2" fo:orphans="2" fo:text-align="start" fo:margin-top="0.1944in" fo:margin-bottom="0.1944in" fo:line-height="100%"/>
      <style:text-properties style:font-name="Arial" style:font-name-asian="Arial Unicode MS" style:font-name-complex="Arial" style:letter-kerning="false" fo:font-size="12pt" style:font-size-asian="12pt" style:font-size-complex="12pt" fo:hyphenate="true"/>
    </style:style>
    <style:style style:name="CommentText" style:display-name="Comment Text" style:family="paragraph" style:parent-style-name="Standard">
      <style:text-properties fo:font-size="10pt" style:font-size-asian="10pt" fo:hyphenate="true"/>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Revision" style:display-name="Revision" style:family="paragraph">
      <style:paragraph-properties fo:widows="2" fo:orphans="2" fo:margin-bottom="0.1388in" fo:line-height="115%"/>
      <style:text-properties style:font-name="Palatino" style:letter-kerning="true" fo:font-size="9.5pt" style:font-size-asian="9.5pt" fo:hyphenate="false"/>
    </style:style>
    <style:style style:name="BalloonText" style:display-name="Balloon Text" style:family="paragraph" style:parent-style-name="Standard">
      <style:paragraph-properties fo:line-height="100%"/>
      <style:text-properties style:font-name="Tahoma" style:font-name-asian="Tahoma" style:font-name-complex="Tahoma" fo:font-size="8pt" style:font-size-asian="8pt" style:font-size-complex="8pt" fo:hyphenate="true"/>
    </style:style>
    <style:style style:name="Framecontents" style:display-name="Frame contents" style:family="paragraph" style:parent-style-name="Standard">
      <style:text-properties fo:hyphenate="true"/>
    </style:style>
    <style:style style:name="ProgramCode" style:display-name="Program Code" style:family="text">
      <style:text-properties style:font-name="ProgramThree" style:font-name-asian="ProgramThree" style:font-name-complex="ProgramThree" fo:color="#008080" fo:font-size="9pt" style:font-size-asian="9pt"/>
    </style:style>
    <style:style style:name="Tablereferenceto" style:display-name="Table (reference to)" style:family="text">
      <style:text-properties fo:color="#00FF00"/>
    </style:style>
    <style:style style:name="Footnoteanchor" style:display-name="Footnote anchor" style:family="text">
      <style:text-properties style:text-position="super 65%"/>
    </style:style>
    <style:style style:name="FootnoteCharacters" style:display-name="Footnote Characters" style:family="text">
      <style:text-properties style:text-position="super 65%"/>
    </style:style>
    <style:style style:name="Url" style:display-name="Url" style:family="text" style:parent-style-name="DefaultParagraphFont">
      <style:text-properties style:font-name="Helvetica Condensed" style:font-name-asian="Helvetica Condensed" style:font-name-complex="Helvetica Condensed" fo:color="#008000" fo:font-size="9pt" style:font-size-asian="9pt"/>
    </style:style>
    <style:style style:name="PageNumber" style:display-name="Page Number" style:family="text" style:parent-style-name="DefaultParagraphFont"/>
    <style:style style:name="Bib.Ref." style:display-name="Bib. Ref." style:family="text">
      <style:text-properties fo:color="#800080"/>
    </style:style>
    <style:style style:name="Figurereferenceto" style:display-name="Figure (reference to)" style:family="text">
      <style:text-properties fo:color="#FF0000"/>
    </style:style>
    <style:style style:name="Footnotereferenceto" style:display-name="Footnote (reference to)" style:family="text" style:parent-style-name="FootnoteCharacters">
      <style:text-properties fo:color="#008000" style:text-position="super 64%" fo:font-size="12.5pt" style:font-size-asian="12.5pt"/>
    </style:style>
    <style:style style:name="MemberType" style:display-name="MemberType" style:family="text" style:parent-style-name="DefaultParagraphFont">
      <style:text-properties style:font-name="Times New Roman" style:font-name-asian="Times New Roman" style:font-name-complex="Times New Roman" fo:font-style="italic" style:font-style-asian="italic" style:font-style-complex="italic" fo:font-size="11pt" style:font-size-asian="11pt" style:font-size-complex="11pt"/>
    </style:style>
    <style:style style:name="Internetlink" style:display-name="Internet link" style:family="text" style:parent-style-name="DefaultParagraphFont">
      <style:text-properties style:font-name="Arial" style:font-name-asian="Arial" style:font-name-complex="Arial" fo:color="#003399"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TextocomentarioCar" style:display-name="Texto comentario Car" style:family="text" style:parent-style-name="DefaultParagraphFont">
      <style:text-properties style:font-name="Palatino" style:font-name-asian="Palatino" style:font-name-complex="Palatino" style:letter-kerning="true"/>
    </style:style>
    <style:style style:name="AsuntodelcomentarioCar" style:display-name="Asunto del comentario Car" style:family="text" style:parent-style-name="TextocomentarioCar">
      <style:text-properties style:font-name="Palatino" style:font-name-asian="Palatino" style:font-name-complex="Palatino" fo:font-weight="bold" style:font-weight-asian="bold" style:font-weight-complex="bold" style:letter-kerning="true"/>
    </style:style>
    <style:style style:name="TextodegloboCar" style:display-name="Texto de globo Car" style:family="text" style:parent-style-name="DefaultParagraphFont">
      <style:text-properties style:font-name="Tahoma" style:font-name-asian="Tahoma" style:font-name-complex="Tahoma" style:letter-kerning="true" fo:font-size="8pt" style:font-size-asian="8pt" style:font-size-complex="8pt"/>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 style:display-name="ListLabel 1" style:family="text">
      <style:text-properties style:font-name-complex="Symbol"/>
    </style:style>
    <style:style style:name="ListLabel2" style:display-name="ListLabel 2" style:family="text">
      <style:text-properties style:font-name-complex="Symbol"/>
    </style:style>
    <style:style style:name="ListLabel3" style:display-name="ListLabel 3" style:family="text">
      <style:text-properties style:font-name-complex="Symbol"/>
    </style:style>
    <style:style style:name="ListLabel4" style:display-name="ListLabel 4" style:family="text">
      <style:text-properties style:font-name-complex="Symbol"/>
    </style:style>
    <style:style style:name="ListLabel5" style:display-name="ListLabel 5" style:family="text">
      <style:text-properties style:font-name-complex="Symbol"/>
    </style:style>
    <style:style style:name="ListLabel6" style:display-name="ListLabel 6" style:family="text">
      <style:text-properties style:font-name-complex="Symbol"/>
    </style:style>
    <style:style style:name="ListLabel7" style:display-name="ListLabel 7" style:family="text">
      <style:text-properties style:font-name-complex="Symbol"/>
    </style:style>
    <style:style style:name="ListLabel8" style:display-name="ListLabel 8" style:family="text">
      <style:text-properties style:font-name-complex="Symbol"/>
    </style:style>
    <style:style style:name="ListLabel9" style:display-name="ListLabel 9" style:family="text">
      <style:text-properties style:font-name-complex="Symbol"/>
    </style:style>
    <style:style style:name="ListLabel10" style:display-name="ListLabel 10" style:family="text">
      <style:text-properties style:font-name-complex="Symbol"/>
    </style:style>
    <style:style style:name="Emphasis" style:display-name="Emphasis" style:family="text">
      <style:text-properties fo:font-style="italic" style:font-style-asian="italic" style:font-style-complex="italic"/>
    </style:style>
    <text:list-style style:name="NoList_1" style:display-name="No List_1">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text:list-style style:name="WWNum1" style:display-name="WWNum1">
      <text:list-level-style-bullet text:level="1" text:style-name="WW_CharLFO2LVL1" text:bullet-char="">
        <style:list-level-properties text:space-before="0.15in" text:min-label-width="0.2in" text:list-level-position-and-space-mode="label-alignment">
          <style:list-level-label-alignment text:label-followed-by="listtab" fo:margin-left="0.35in" fo:text-indent="-0.2in"/>
        </style:list-level-properties>
        <style:text-properties style:font-name="Symbol"/>
      </text:list-level-style-bullet>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2"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2"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2"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2"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2"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2"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Symbol" style:font-name-complex="Symbol"/>
    </style:style>
    <style:style style:name="WW_CharLFO4LVL3" style:family="text">
      <style:text-properties style:font-name="Symbol" style:font-name-complex="Symbol"/>
    </style:style>
    <style:style style:name="WW_CharLFO4LVL4" style:family="text">
      <style:text-properties style:font-name="Symbol" style:font-name-complex="Symbol"/>
    </style:style>
    <style:style style:name="WW_CharLFO4LVL5" style:family="text">
      <style:text-properties style:font-name="Symbol" style:font-name-complex="Symbol"/>
    </style:style>
    <style:style style:name="WW_CharLFO4LVL6" style:family="text">
      <style:text-properties style:font-name="Symbol" style:font-name-complex="Symbol"/>
    </style:style>
    <style:style style:name="WW_CharLFO4LVL7" style:family="text">
      <style:text-properties style:font-name="Symbol" style:font-name-complex="Symbol"/>
    </style:style>
    <style:style style:name="WW_CharLFO4LVL8" style:family="text">
      <style:text-properties style:font-name="Symbol" style:font-name-complex="Symbol"/>
    </style:style>
    <style:style style:name="WW_CharLFO4LVL9" style:family="text">
      <style:text-properties style:font-name="Symbol" style:font-name-complex="Symbol"/>
    </style:style>
    <text:list-style style:name="WWNum3" style:display-name="WWNum3">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WWNum4" style:display-name="WWNum4">
      <text:list-level-style-number text:level="1" style:num-list-format-name="NLF2"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list-format-name="NLF2" style:num-format="1" text:display-levels="2">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list-format-name="NLF2" style:num-format="1" text:display-levels="3">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list-format-name="NLF2" style:num-format="1" text:display-levels="4">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list-format-name="NLF2" style:num-format="1" text:display-levels="5">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list-format-name="NLF2" style:num-format="1" text:display-levels="6">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list-format-name="NLF2" style:num-format="1" text:display-levels="7">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list-format-name="NLF2" style:num-format="1" text:display-levels="8">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list-format-name="NLF2" style:num-format="1" text:display-levels="9">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5" style:display-name="WWNum5">
      <text:list-level-style-number text:level="1" style:num-list-format-name="NLF3" style:num-format="">
        <style:list-level-properties text:list-level-position-and-space-mode="label-alignment">
          <style:list-level-label-alignment text:label-followed-by="nothing"/>
        </style:list-level-properties>
      </text:list-level-style-number>
      <text:list-level-style-number text:level="2" style:num-list-format-name="NLF3" style:num-format="">
        <style:list-level-properties text:list-level-position-and-space-mode="label-alignment">
          <style:list-level-label-alignment text:label-followed-by="nothing"/>
        </style:list-level-properties>
      </text:list-level-style-number>
      <text:list-level-style-number text:level="3" style:num-list-format-name="NLF3" style:num-format="">
        <style:list-level-properties text:list-level-position-and-space-mode="label-alignment">
          <style:list-level-label-alignment text:label-followed-by="nothing"/>
        </style:list-level-properties>
      </text:list-level-style-number>
      <text:list-level-style-number text:level="4" style:num-list-format-name="NLF3" style:num-format="">
        <style:list-level-properties text:list-level-position-and-space-mode="label-alignment">
          <style:list-level-label-alignment text:label-followed-by="nothing"/>
        </style:list-level-properties>
      </text:list-level-style-number>
      <text:list-level-style-number text:level="5" style:num-list-format-name="NLF3" style:num-format="">
        <style:list-level-properties text:list-level-position-and-space-mode="label-alignment">
          <style:list-level-label-alignment text:label-followed-by="nothing"/>
        </style:list-level-properties>
      </text:list-level-style-number>
      <text:list-level-style-number text:level="6" style:num-list-format-name="NLF3" style:num-format="">
        <style:list-level-properties text:list-level-position-and-space-mode="label-alignment">
          <style:list-level-label-alignment text:label-followed-by="nothing"/>
        </style:list-level-properties>
      </text:list-level-style-number>
      <text:list-level-style-number text:level="7" style:num-list-format-name="NLF3" style:num-format="">
        <style:list-level-properties text:list-level-position-and-space-mode="label-alignment">
          <style:list-level-label-alignment text:label-followed-by="nothing"/>
        </style:list-level-properties>
      </text:list-level-style-number>
      <text:list-level-style-number text:level="8" style:num-list-format-name="NLF3" style:num-format="">
        <style:list-level-properties text:list-level-position-and-space-mode="label-alignment">
          <style:list-level-label-alignment text:label-followed-by="nothing"/>
        </style:list-level-properties>
      </text:list-level-style-number>
      <text:list-level-style-number text:level="9" style:num-list-format-name="NLF3"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e76500" draw:opacity="100%" draw:stroke="solid" svg:stroke-width="0.01389in" svg:stroke-color="#612600"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7.8743in" fo:page-height="10.7479in" style:print-orientation="portrait" fo:margin-top="0.4215in" fo:margin-left="0.5in" fo:margin-bottom="0.0513in" fo:margin-right="0.4215in" style:num-format="1" style:writing-mode="lr-tb">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1965in"/>
      </style:footer-style>
    </style:page-layout>
    <style:style style:name="P2" style:parent-style-name="Header" style:family="paragraph">
      <style:paragraph-properties fo:line-height="0.125in">
        <style:tab-stops>
          <style:tab-stop style:type="right" style:position="7.1666in"/>
        </style:tab-stops>
      </style:paragraph-properties>
    </style:style>
    <style:style style:name="T3" style:parent-style-name="DefaultParagraphFont" style:family="text">
      <style:text-properties fo:font-style="italic" style:font-style-asian="italic" fo:text-transform="none" text:display="none"/>
    </style:style>
    <style:style style:name="T4" style:parent-style-name="DefaultParagraphFont" style:family="text">
      <style:text-properties fo:text-transform="none" text:display="none"/>
    </style:style>
    <style:style style:name="P5" style:parent-style-name="Header" style:family="paragraph">
      <style:paragraph-properties fo:line-height="0.125in">
        <style:tab-stops>
          <style:tab-stop style:type="right" style:position="7.1666in"/>
        </style:tab-stops>
      </style:paragraph-properties>
    </style:style>
    <style:style style:name="T6" style:parent-style-name="DefaultParagraphFont" style:family="text">
      <style:text-properties fo:font-weight="bold" style:font-weight-asian="bold" fo:font-style="italic" style:font-style-asian="italic" text:display="none" fo:language="es" fo:country="ES"/>
    </style:style>
    <style:style style:name="T7" style:parent-style-name="DefaultParagraphFont" style:family="text">
      <style:text-properties fo:font-style="italic" style:font-style-asian="italic" fo:text-transform="none" text:display="none" fo:language="es" fo:country="ES"/>
    </style:style>
    <style:style style:name="T8" style:parent-style-name="DefaultParagraphFont" style:family="text">
      <style:text-properties fo:language="es" fo:country="ES"/>
    </style:style>
    <style:style style:name="T9" style:parent-style-name="DefaultParagraphFont" style:family="text">
      <style:text-properties fo:color="#000000" fo:language="ca" fo:country="ES"/>
    </style:style>
    <style:style style:name="P10" style:parent-style-name="Standard" style:family="paragraph">
      <style:paragraph-properties fo:text-align="center" fo:line-height="0.0138in"/>
      <style:text-properties style:font-name="Arial"/>
    </style:style>
    <style:style style:name="P11" style:parent-style-name="Standard" style:family="paragraph">
      <style:paragraph-properties fo:text-align="center" fo:line-height="0.0138in"/>
    </style:style>
    <style:style style:name="P12" style:parent-style-name="Header" style:family="paragraph">
      <style:paragraph-properties fo:line-height="0.125in">
        <style:tab-stops>
          <style:tab-stop style:type="right" style:position="7.1666in"/>
        </style:tab-stops>
      </style:paragraph-properties>
    </style:style>
    <style:style style:name="T13" style:parent-style-name="DefaultParagraphFont" style:family="text">
      <style:text-properties fo:language="ca" fo:country="ES"/>
    </style:style>
    <style:style style:name="T14" style:parent-style-name="DefaultParagraphFont" style:family="text">
      <style:text-properties fo:language="es" fo:country="ES"/>
    </style:style>
    <style:style style:name="T15" style:parent-style-name="DefaultParagraphFont" style:family="text">
      <style:text-properties fo:font-weight="bold" style:font-weight-asian="bold" fo:text-transform="none" text:display="none" fo:font-size="8pt" style:font-size-asian="8pt" fo:language="es" fo:country="ES"/>
    </style:style>
    <style:style style:name="T16" style:parent-style-name="DefaultParagraphFont" style:family="text">
      <style:text-properties fo:text-transform="none" text:display="none" fo:language="es" fo:country="ES"/>
    </style:style>
    <style:style style:name="P17" style:parent-style-name="Footer" style:family="paragraph">
      <style:paragraph-properties fo:text-align="center" fo:line-height="0.0138in"/>
    </style:style>
    <style:page-layout style:name="PL2">
      <style:page-layout-properties fo:page-width="7.8743in" fo:page-height="10.7479in" style:print-orientation="portrait" fo:margin-top="0.4215in" fo:margin-left="0.5in" fo:margin-bottom="0.0513in" fo:margin-right="0.4215in" style:num-format="1" style:writing-mode="lr-tb">
        <style:columns fo:column-count="2">
          <style:column style:rel-width="5006*" fo:start-indent="0in" fo:end-indent="0.0833in"/>
          <style:column style:rel-width="5006*" fo:start-indent="0.0833in" fo:end-indent="0in"/>
        </style:columns>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1965in"/>
      </style:footer-style>
    </style:page-layout>
    <style:style style:name="P236" style:parent-style-name="Header" style:family="paragraph">
      <style:paragraph-properties fo:line-height="0.125in">
        <style:tab-stops>
          <style:tab-stop style:type="right" style:position="7.1666in"/>
        </style:tab-stops>
      </style:paragraph-properties>
    </style:style>
    <style:style style:name="T237" style:parent-style-name="DefaultParagraphFont" style:family="text">
      <style:text-properties fo:color="#000000" fo:language="ca" fo:country="ES"/>
    </style:style>
    <style:style style:name="T238" style:parent-style-name="DefaultParagraphFont" style:family="text">
      <style:text-properties fo:font-style="italic" style:font-style-asian="italic" fo:text-transform="none" text:display="none"/>
    </style:style>
    <style:style style:name="T239" style:parent-style-name="DefaultParagraphFont" style:family="text">
      <style:text-properties fo:text-transform="none" text:display="none"/>
    </style:style>
    <style:style style:name="P240" style:parent-style-name="Header" style:family="paragraph">
      <style:paragraph-properties fo:line-height="0.125in">
        <style:tab-stops>
          <style:tab-stop style:type="right" style:position="7.1666in"/>
        </style:tab-stops>
      </style:paragraph-properties>
    </style:style>
    <style:style style:name="T241" style:parent-style-name="DefaultParagraphFont" style:family="text">
      <style:text-properties fo:font-weight="bold" style:font-weight-asian="bold" fo:font-style="italic" style:font-style-asian="italic" text:display="none" fo:language="es" fo:country="ES"/>
    </style:style>
    <style:style style:name="T242" style:parent-style-name="DefaultParagraphFont" style:family="text">
      <style:text-properties fo:font-style="italic" style:font-style-asian="italic" fo:text-transform="none" text:display="none" fo:language="es" fo:country="ES"/>
    </style:style>
    <style:style style:name="T243" style:parent-style-name="DefaultParagraphFont" style:family="text">
      <style:text-properties fo:language="es" fo:country="ES"/>
    </style:style>
    <style:style style:name="T244" style:parent-style-name="DefaultParagraphFont" style:family="text">
      <style:text-properties fo:language="ca" fo:country="ES"/>
    </style:style>
    <style:style style:name="P245" style:parent-style-name="Standard" style:family="paragraph">
      <style:paragraph-properties fo:text-align="center" fo:line-height="0.0138in"/>
      <style:text-properties style:font-name="Arial"/>
    </style:style>
    <style:style style:name="P246" style:parent-style-name="Standard" style:family="paragraph">
      <style:paragraph-properties fo:text-align="center" fo:line-height="0.0138in"/>
    </style:style>
  </office:automatic-styles>
  <office:master-styles>
    <style:master-page style:name="MPF0" style:page-layout-name="PL0">
      <style:header>
        <text:p text:style-name="P2">AUTHOR: <text:s/>TITLE<text:tab/><text:span text:style-name="T3">odd page</text:span><text:span text:style-name="T4"><text:s text:c="4"/></text:span><text:page-number text:fixed="false">3</text:page-number></text:p>
      </style:header>
      <style:header-left>
        <text:p text:style-name="P5"><text:page-number text:fixed="false">2</text:page-number><text:span text:style-name="T6"><text:s text:c="3"/></text:span><text:span text:style-name="T7">even page</text:span><text:span text:style-name="T8"><text:tab/>EE/UAB TFG:<text:s/></text:span><text:span text:style-name="T9">Construcció d’una ETL per a la consolidació de prospecció comercial</text:span></text:p>
      </style:header-left>
      <style:footer>
        <text:p text:style-name="P10"/>
      </style:footer>
      <style:footer-left>
        <text:p text:style-name="P11"/>
      </style:footer-left>
      <style:header-first>
        <text:p text:style-name="P12"><text:span text:style-name="T13">TFG EN ENGINYERIA DADES, ESCOLA D’ENGINYERIA (EE), UNIversitat autònoma de barcelona (uab)</text:span><text:span text:style-name="T14"><text:tab/></text:span><text:span text:style-name="T15">first page</text:span><text:span text:style-name="T16"><text:s text:c="3"/></text:span><text:page-number text:fixed="false">1</text:page-number></text:p>
      </style:header-first>
      <style:footer-first>
        <text:p text:style-name="P17"/>
      </style:footer-first>
    </style:master-page>
    <style:master-page style:name="MP2" style:page-layout-name="PL2">
      <style:header>
        <text:p text:style-name="P236">Dante rodríguez Milán:<text:s/><text:span text:style-name="T237">Construcció d’una ETL per a la consolidació de prospecció comercial</text:span><text:tab/><text:span text:style-name="T238">odd page</text:span><text:span text:style-name="T239"><text:s text:c="4"/></text:span><text:page-number text:fixed="false">0</text:page-number></text:p>
      </style:header>
      <style:header-left>
        <text:p text:style-name="P240"><text:page-number text:fixed="false">4</text:page-number><text:span text:style-name="T241"><text:s text:c="3"/></text:span><text:span text:style-name="T242">even page</text:span><text:span text:style-name="T243"><text:tab/></text:span><text:span text:style-name="T244">EE/UAB TFG DADES: títol TREBALL (abreUJAT si És molt llarG)</text:span></text:p>
      </style:header-left>
      <style:footer>
        <text:p text:style-name="P245"/>
      </style:footer>
      <style:footer-left>
        <text:p text:style-name="P246"/>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ransaction / Regular Paper Title</dc:title>
    <dc:description>New styles and page layout for 1996.</dc:description>
    <meta:initial-creator>Erin Espriu</meta:initial-creator>
    <dc:creator>Rodriguez Milan, Dante</dc:creator>
    <meta:creation-date>2012-11-09T22:24:00Z</meta:creation-date>
    <dc:date>2026-04-19T12:19:00Z</dc:date>
    <meta:print-date>2013-11-28T11:41:00Z</meta:print-date>
    <meta:template xlink:href="Normal.dotm" xlink:type="simple"/>
    <meta:editing-cycles>64</meta:editing-cycles>
    <meta:editing-duration>PT22260S</meta:editing-duration>
    <meta:user-defined meta:name="AppVersion">15.0000</meta:user-defined>
    <meta:user-defined meta:name="Company">IEEE Computer Socie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44" meta:word-count="3318" meta:character-count="22188" meta:row-count="157" meta:non-whitespace-character-count="18914"/>
  </office:meta>
</office:document-meta>
</file>